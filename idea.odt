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247cm" style:contextual-spacing="false" fo:line-height="114%" fo:text-indent="0cm" style:auto-text-indent="false"/>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line-height="114%"/>
    </style:style>
    <style:style style:name="T1"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750bb6e3-7fff-4cd8-d317-860712b136cc"/>Here is a highly curated list of **100 legendary historical chess games**, divided evenly across the four core strategic categories defined in your database matrix. This dataset covers iconic matches spanning from the Romantic era of the 1800s up to modern World Championships.</text:p>
      <text:p text:style-name="P2">## ⚔️ Category 1: Open Horizons &amp; Gambits (cat_tactical)</text:p>
      <text:p text:style-name="P2">*Focus: King attacks, open files, piece sacrifices, and tactical calculation.*</text:p>
      <text:p text:style-name="P2">| # | Matchup (White vs. Black) | Year | Notable Event / Identity | Core Educational Theme |</text:p>
      <text:p text:style-name="P2">|---|---|---|---|---|</text:p>
      <text:p text:style-name="P2">| 1 | Adolf Anderssen vs. Lionel Kieseritzky | 1851 | The Immortal Game | Full piece sacrifice for checkmate |</text:p>
      <text:p text:style-name="P2">| 2 | Adolf Anderssen vs. Jean Dufresne | 1852 | The Evergreen Game | Brilliant queen sacrifice for open lines |</text:p>
      <text:p text:style-name="P2">| 3 | Paul Morphy vs. Duke of Brunswick &amp; Count Isouard | 1858 | The Opera House Game | Rapid development &amp; mating nets |</text:p>
      <text:p text:style-name="P2">| 4 | Paul Morphy vs. Adolf Anderssen | 1858 | Match (Game 9) | Dynamic development in open lines |</text:p>
      <text:p text:style-name="P2">| 5 | Emanuel Lasker vs. Johann Bauer | 1889 | Amsterdam | The classic double-bishop sacrifice |</text:p>
      <text:p text:style-name="P2">| 6 | Wilhelm Steinitz vs. Curt von Bardeleben | 1895 | Hastings | Exploding king hunt with a hanging rook |</text:p>
      <text:p text:style-name="P2">| 7 | Harry Pillsbury vs. Emanuel Lasker | 1896 | Nuremberg | Sharp tactical counter-punching |</text:p>
      <text:p text:style-name="P2">| 8 | Georg Rotlewi vs. Akiba Rubinstein | 1907 | Rubinstein's Immortal | Deep, multi-piece tactical combination |</text:p>
      <text:p text:style-name="P2">| 9 | José Raúl Capablanca vs. Herman Fonaroff | 1918 | New York | Back-rank tactical combination |</text:p>
      <text:p text:style-name="P2">| 10 | Alexander Alekhine vs. Frederick Yates | 1922 | London | Kingside pawn-storm and piece assault |</text:p>
      <text:p text:style-name="P2">| 11 | Richard Réti vs. Alexander Alekhine | 1925 | Baden-Baden | Hypermodern tactical complications |</text:p>
      <text:p text:style-name="P2">| 12 | Mikhail Botvinnik vs. José Raúl Capablanca | 1938 | AVRO Tournament | Deflection sacrifice to clear open lines |</text:p>
      <text:p text:style-name="P2">| 13 | Donald Byrne vs. Bobby Fischer | 1956 | Game of the Century | Queen sacrifice by a 13-year-old |</text:p>
      <text:p text:style-name="P2">| 14 | Mikhail Tal vs. Alexander Tolush | 1957 | USSR Championship | High-risk intuitive attacking sacrifices |</text:p>
      <text:p text:style-name="P2">| 15 | Mikhail Tal vs. Vasily Smyslov | 1959 | Bled Candidates | Speculative tactical king hunt |</text:p>
      <text:p text:style-name="P2">| 16 | Bobby Fischer vs. Reuben Fine | 1963 | New York Blitz | Evans Gambit rapid miniature crush |</text:p>
      <text:p text:style-name="P2">| 17 | Boris Spassky vs. Bent Larsen | 1970 | Belgrade | Punishing 1.b3 with a mating attack |</text:p>
      <text:p text:style-name="P2">| 18 | Garry Kasparov vs. Veselin Topalov | 1999 | Kasparov's Immortal | Extraordinary long-range rook sacrifice |</text:p>
      <text:p text:style-name="P2">| 19 | Viswanathan Anand vs. Joël Lautier | 1997 | Credit Suisse | Masterclass in open-line tactical pressure |</text:p>
      <text:p text:style-name="P2">| 20 | Alexei Shirov vs. Veselin Topalov | 1998 | Linares | Legendary tactical bishop sacrifice |</text:p>
      <text:p text:style-name="P2"><text:soft-page-break/>| 21 | Vladimir Kramnik vs. Garry Kasparov | 1994 | Munich Intel | High-level tactical Nimzo-Indian attack |</text:p>
      <text:p text:style-name="P2">| 22 | Veselin Topalov vs. Viswanathan Anand | 2010 | World Ch. (Game 4) | High-stakes tactical onslaught |</text:p>
      <text:p text:style-name="P2">| 23 | Levon Aronian vs. Viswanathan Anand | 2013 | Tata Steel | Modern attacking masterclass with Black |</text:p>
      <text:p text:style-name="P2">| 24 | Wei Yi vs. Lázaro Bruzón Batista | 2015 | Danzhou | Modern-era immortal king hunt |</text:p>
      <text:p text:style-name="P2">| 25 | Magnus Carlsen vs. Sergey Karjakin | 2016 | World Ch. (Tiebreak 4) | Championship-winning queen sacrifice |</text:p>
      <text:p text:style-name="P2">## 🛡️ Category 2: The Iron Fortress (cat_positional)</text:p>
      <text:p text:style-name="P2">*Focus: Prophylaxis, pawn structures, outposts, and positional suffocation.*</text:p>
      <text:p text:style-name="P2">| # | Matchup (White vs. Black) | Year | Notable Event / Identity | Core Educational Theme |</text:p>
      <text:p text:style-name="P2">|---|---|---|---|---|</text:p>
      <text:p text:style-name="P2">| 26 | Louis Paulsen vs. Paul Morphy | 1857 | First American Chess Cong. | Positional queen sac for square control |</text:p>
      <text:p text:style-name="P2">| 27 | Wilhelm Steinitz vs. Joseph Blackburne | 1876 | London Match | Early demonstration of closed maneuvers |</text:p>
      <text:p text:style-name="P2">| 28 | Frank Marshall vs. José Raúl Capablanca | 1918 | The Marshall Attack | Defending aggressive gambits cleanly |</text:p>
      <text:p text:style-name="P2">| 29 | Aron Nimzowitsch vs. Akiba Rubinstein | 1926 | Dresden | Prophylaxis and blockade masterpiece |</text:p>
      <text:p text:style-name="P2">| 30 | José Raúl Capablanca vs. Savielly Tartakower | 1924 | New York | Clinic in passive piece exploitation |</text:p>
      <text:p text:style-name="P2">| 31 | Alexander Alekhine vs. Aron Nimzowitsch | 1930 | San Remo | The creation of "Alekhine's Gun" |</text:p>
      <text:p text:style-name="P2">| 32 | Max Euwe vs. Alexander Alekhine | 1935 | World Ch. (Game 26) | Strategic positional maneuvering |</text:p>
      <text:p text:style-name="P2">| 33 | Aron Nimzowitsch vs. José Raúl Capablanca | 1927 | New York | Positional counterplay on open files |</text:p>
      <text:p text:style-name="P2">| 34 | Mikhail Botvinnik vs. Savielly Tartakower | 1936 | Nottingham | Mastering hanging pawn structures |</text:p>
      <text:p text:style-name="P2">| 35 | Samuel Reshevsky vs. Tigran Petrosian | 1953 | Zurich Candidates | Classic positional exchange sacrifice |</text:p>
      <text:p text:style-name="P2">| 36 | Tigran Petrosian vs. Mikhail Botvinnik | 1963 | World Ch. (Game 5) | The peak of prophylactic piece restriction |</text:p>
      <text:p text:style-name="P2">| 37 | Bobby Fischer vs. Tigran Petrosian | 1971 | Buenos Aires Candidates | Exchanging a good knight for a bad bishop |</text:p>
      <text:p text:style-name="P2">| 38 | Anatoly Karpov vs. Boris Spassky | 1974 | Candidates Match | Positional binding on the queenside |</text:p>
      <text:p text:style-name="P2">| 39 | Anatoly Karpov vs. Garry Kasparov | 1984 | World Ch. (Game 9) | The classic long-term positional squeeze |</text:p>
      <text:p text:style-name="P2"><text:soft-page-break/>| 40 | Artur Yusupov vs. Vassily Ivanchuk | 1991 | Brussels Candidates | Positional structure building |</text:p>
      <text:p text:style-name="P2">| 41 | Vladimir Kramnik vs. Garry Kasparov | 2000 | World Ch. (Game 1) | The Berlin Wall positional masterclass |</text:p>
      <text:p text:style-name="P2">| 42 | Garry Kasparov vs. Anatoly Karpov | 1990 | World Ch. (Game 20) | Positional Ruy Lopez strategy |</text:p>
      <text:p text:style-name="P2">| 43 | Boris Gelfand vs. Michael Adams | 1993 | Groningen | Strategic squeeze on weak colored squares |</text:p>
      <text:p text:style-name="P2">| 44 | Magnus Carlsen vs. Vladimir Kramnik | 2009 | London Classic | Strategic pressure via pawn structures |</text:p>
      <text:p text:style-name="P2">| 45 | Viswanathan Anand vs. Vladimir Kramnik | 2008 | World Ch. (Game 6) | Positional dominance via active pieces |</text:p>
      <text:p text:style-name="P2">| 46 | Fabiano Caruana vs. Hikaru Nakamura | 2014 | Sinquefield Cup | Modern positional center control |</text:p>
      <text:p text:style-name="P2">| 47 | Magnus Carlsen vs. Sergey Karjakin | 2016 | World Ch. (Game 10) | Finding microscopic positional advantages |</text:p>
      <text:p text:style-name="P2">| 48 | Ding Liren vs. Ian Nepomniachtchi | 2023 | World Ch. (Game 12) | High-pressure positional restriction |</text:p>
      <text:p text:style-name="P2">| 49 | Wesley So vs. Magnus Carlsen | 2020 | Skilling Open | Solid positional blockade and safety |</text:p>
      <text:p text:style-name="P2">| 50 | Anish Giri vs. Ian Nepomniachtchi | 2021 | Candidates Tournament | Precision prophylactic execution |</text:p>
      <text:p text:style-name="P2">## ⚡ Category 3: The Counterstrike Collection (cat_counter)</text:p>
      <text:p text:style-name="P2">*Focus: Sharp defense turning into instant attack, and dynamic imbalances.*</text:p>
      <text:p text:style-name="P2">| # | Matchup (White vs. Black) | Year | Notable Event / Identity | Core Educational Theme |</text:p>
      <text:p text:style-name="P2">|---|---|---|---|---|</text:p>
      <text:p text:style-name="P2">| 51 | Mikhail Chigorin vs. Wilhelm Steinitz | 1892 | World Ch. (Game 4) | Early romantic dynamic counter-attack |</text:p>
      <text:p text:style-name="P2">| 52 | Ossip Bernstein vs. José Raúl Capablanca | 1914 | St. Petersburg | Counter-tactics with a hanging queen |</text:p>
      <text:p text:style-name="P2">| 53 | Efim Bogoljubov vs. Alexander Alekhine | 1922 | Hastings | Dynamic double-rook counterplay |</text:p>
      <text:p text:style-name="P2">| 54 | Arnold Denker vs. Mikhail Botvinnik | 1945 | USA-USSR Radio Match | Sharp counter-offensive in the Botvinnik variation |</text:p>
      <text:p text:style-name="P2">| 55 | Efim Geller vs. Max Euwe | 1953 | Zurich Candidates | Deflecting an aggressive kingside storm |</text:p>
      <text:p text:style-name="P2">| 56 | Robert Byrne vs. Bobby Fischer | 1963 | US Championship | Sharp counter-punching in the Neo-Grunfeld |</text:p>
      <text:p text:style-name="P2">| 57 | Lev Polugaevsky vs. Mikhail Tal | 1979 | Riga Interzonal | Electric dynamic defensive counter-punch |</text:p>
      <text:p text:style-name="P2">| 58 | Boris Spassky vs. Bobby Fischer | 1972 | World Ch. (Game 3) | Sharp, rule-breaking modern counter-play |</text:p>
      <text:p text:style-name="P2">| 59 | Garry Kasparov vs. Lajos Portisch | 1983 | Niksic | Sharp defense leading to an explosion |</text:p>
      <text:p text:style-name="P2"><text:soft-page-break/>| 60 | Anatoly Karpov vs. Garry Kasparov | 1985 | World Ch. (Game 16) | The "Octopus Knight" dynamic counterstrike |</text:p>
      <text:p text:style-name="P2">| 61 | Nigel Short vs. Garry Kasparov | 1993 | World Ch. (Game 4) | High-tension tactical counter-play |</text:p>
      <text:p text:style-name="P2">| 62 | Viswanathan Anand vs. Garry Kasparov | 1995 | World Ch. (Game 14) | Sicilian Dragon explosive counter-offensive |</text:p>
      <text:p text:style-name="P2">| 63 | Vladimir Kramnik vs. Veselin Topalov | 2006 | World Ch. (Game 2) | High-tension dynamic counter-punching |</text:p>
      <text:p text:style-name="P2">| 64 | Teimour Radjabov vs. Garry Kasparov | 2003 | Linares | Exploiting overextension in the French Defense |</text:p>
      <text:p text:style-name="P2">| 65 | Veselin Topalov vs. Garry Kasparov | 2005 | Linares | Kasparov's final pro game; sharp dynamics |</text:p>
      <text:p text:style-name="P2">| 66 | Vassily Ivanchuk vs. Garry Kasparov | 1991 | Linares | Active piece play over structural damage |</text:p>
      <text:p text:style-name="P2">| 67 | Viswanathan Anand vs. Veselin Topalov | 2005 | Sofia | Sharp tactical defense and counter-striking |</text:p>
      <text:p text:style-name="P2">| 68 | Hikaru Nakamura vs. Boris Gelfand | 2010 | Bursa | High-risk King's Indian counter-attack |</text:p>
      <text:p text:style-name="P2">| 69 | Levon Aronian vs. Magnus Carlsen | 2012 | Wijk aan Zee | Exploiting imbalances on the board |</text:p>
      <text:p text:style-name="P2">| 70 | Fabiano Caruana vs. Magnus Carlsen | 2018 | World Ch. (Game 1) | High-tension Sicilian counter-striking |</text:p>
      <text:p text:style-name="P2">| 71 | Daniil Dubov vs. Sergey Karjakin | 2020 | Russian Superfinal | Ultra-modern creative dynamic counter-punch |</text:p>
      <text:p text:style-name="P2">| 72 | Ian Nepomniachtchi vs. Ding Liren | 2023 | World Ch. (Game 2) | Unbalancing modern tactical counter-offensives |</text:p>
      <text:p text:style-name="P2">| 73 | R Praggnanandhaa vs. Magnus Carlsen | 2022 | Airthings Masters | Rapid counter-offensive capitalizing on blunders |</text:p>
      <text:p text:style-name="P2">| 74 | D Gukesh vs. Fabiano Caruana | 2024 | Candidates Tournament | High-stakes dynamic defensive shield |</text:p>
      <text:p text:style-name="P2">| 75 | Alireza Firouzja vs. Magnus Carlsen | 2021 | European Team Ch. | Young generation dynamic tactical slugfest |</text:p>
      <text:p text:style-name="P2">## 👑 Category 4: The Endgame Squeeze (cat_endgame)</text:p>
      <text:p text:style-name="P2">*Focus: Technical conversions, king activity, and pawn promotion races.*</text:p>
      <text:p text:style-name="P2">| # | Matchup (White vs. Black) | Year | Notable Event / Identity | Core Educational Theme |</text:p>
      <text:p text:style-name="P2">|---|---|---|---|---|</text:p>
      <text:p text:style-name="P2">| 76 | Joseph Blackburne vs. Wilhelm Steinitz | 1863 | London | Foundational endgame conversion technique |</text:p>
      <text:p text:style-name="P2">| 77 | Emanuel Lasker vs. Akiba Rubinstein | 1914 | St. Petersburg | Simplifying to a winning rook endgame |</text:p>
      <text:p text:style-name="P2">| 78 | José Raúl Capablanca vs. Frederick Yates | 1924 | Barcelona | Clinical execution of king activity |</text:p>
      <text:p text:style-name="P2"><text:soft-page-break/>| 79 | Akiba Rubinstein vs. Richard Cohn | 1909 | St. Petersburg | The textbook King and Pawn endgame |</text:p>
      <text:p text:style-name="P2">| 80 | Alexander Alekhine vs. José Raúl Capablanca | 1927 | World Ch. (Game 34) | Grueling, long-range endgame conversion |</text:p>
      <text:p text:style-name="P2">| 81 | Mikhail Botvinnik vs. Alexander Alekhine | 1938 | AVRO Tournament | Transitioning cleanly into a won endgame |</text:p>
      <text:p text:style-name="P2">| 82 | Vasily Smyslov vs. Pal Benko | 1969 | Monte Carlo | Masterclass in minor piece endgame precision |</text:p>
      <text:p text:style-name="P2">| 83 | Bobby Fischer vs. Mark Taimanov | 1971 | Vancouver Match (Game 4) | The textbook Bishop vs. Knight reference game |</text:p>
      <text:p text:style-name="P2">| 84 | Bobby Fischer vs. Boris Spassky | 1972 | World Ch. (Game 5) | Converting microscopic structural edges |</text:p>
      <text:p text:style-name="P2">| 85 | Anatoly Karpov vs. Garry Kasparov | 1984 | World Ch. (Game 27) | Clinical, grinding endgame technique |</text:p>
      <text:p text:style-name="P2">| 86 | Garry Kasparov vs. Anatoly Karpov | 1987 | World Ch. (Game 24) | High-pressure, must-win technical squeeze |</text:p>
      <text:p text:style-name="P2">| 87 | Vladimir Kramnik vs. Lázaro Bruzón | 2002 | Wijk aan Zee | Technical execution of a rook endgame squeeze |</text:p>
      <text:p text:style-name="P2">| 88 | Magnus Carlsen vs. Levon Aronian | 2012 | Bilbao Masters | Grinding down a drawn-looking endgame |</text:p>
      <text:p text:style-name="P2">| 89 | Magnus Carlsen vs. Sergey Karjakin | 2013 | Tal Memorial | Exploitation of space in minor piece endings |</text:p>
      <text:p text:style-name="P2">| 90 | Viswanathan Anand vs. Magnus Carlsen | 2013 | World Ch. (Game 5) | Forcing simplification to win a rook endgame |</text:p>
      <text:p text:style-name="P2">| 91 | Fabiano Caruana vs. Hikaru Nakamura | 2015 | Zurich | Precision rook and pawn endgame alignment |</text:p>
      <text:p text:style-name="P2">| 92 | Péter Lékó vs. Vladimir Kramnik | 2004 | World Ch. (Game 5) | High-stakes deep technical endgame duel |</text:p>
      <text:p text:style-name="P2">| 93 | Reuben Fine vs. José Raúl Capablanca | 1938 | AVRO Tournament | Iconic defensive hold in an inferior endgame |</text:p>
      <text:p text:style-name="P2">| 94 | Harry Pillsbury vs. Isidor Gunsberg | 1895 | Hastings | Classic breakthrough in a pawn endgame |</text:p>
      <text:p text:style-name="P2">| 95 | José Raúl Capablanca vs. Emanuel Lasker | 1921 | World Ch. (Game 10) | Smooth simplification to a winning minor piece end |</text:p>
      <text:p text:style-name="P2">| 96 | Vasily Smyslov vs. Samuel Reshevsky | 1948 | World Championship | Rook and pawn coordination mastery |</text:p>
      <text:p text:style-name="P2">| 97 | Viktor Korchnoi vs. Anatoly Karpov | 1978 | World Ch. (Game 31) | High-stakes endgame grind under time pressure |</text:p>
      <text:p text:style-name="P2">| 98 | Ding Liren vs. Fabiano Caruana | 2019 | Grand Chess Tour | Clean endgame conversion against world-class defense |</text:p>
      <text:p text:style-name="P2">| 99 | Magnus Carlsen vs. Hikaru Nakamura | 2022 | Champions Chess Tour | Legendary rapid technical conversion grind |</text:p>
      <text:p text:style-name="P2"><text:soft-page-break/>| 100 | D Gukesh vs. Vidit Gujrathi | 2024 | Candidates Tournament | Precise technical endgame squeeze under tension |</text:p>
      <text:p text:style-name="P3"><text:span text:style-name="T1"><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6T15:13:44.030238000</meta:creation-date>
    <dc:date>2026-06-11T12:44:47.221364700</dc:date>
    <meta:editing-duration>PT7M1S</meta:editing-duration>
    <meta:editing-cycles>2</meta:editing-cycles>
    <meta:generator>LibreOffice/26.2.3.2$Windows_X86_64 LibreOffice_project/70e089b17412e4cb7773e41413306b17a2328c34</meta:generator>
    <meta:document-statistic meta:table-count="0" meta:image-count="0" meta:object-count="0" meta:page-count="6" meta:paragraph-count="118" meta:word-count="2263" meta:character-count="12176" meta:non-whitespace-character-count="10049"/>
  </office:meta>
</office:document-meta>
</file>