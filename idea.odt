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5.759cm" table:align="left"/>
    </style:style>
    <style:style style:name="Table1.A" style:family="table-column">
      <style:table-column-properties style:column-width="4.747cm"/>
    </style:style>
    <style:style style:name="Table1.B" style:family="table-column">
      <style:table-column-properties style:column-width="4.136cm"/>
    </style:style>
    <style:style style:name="Table1.C" style:family="table-column">
      <style:table-column-properties style:column-width="6.876cm"/>
    </style:style>
    <style:style style:name="Table1.A1" style:family="table-cell">
      <style:table-cell-properties style:vertical-align="middle" fo:padding-left="0.318cm" fo:padding-right="0.318cm" fo:padding-top="0.212cm" fo:padding-bottom="0.212cm" fo:border="0.05pt solid #c4c7c5"/>
    </style:style>
    <style:style style:name="Table2" style:family="table">
      <style:table-properties style:width="17cm" table:align="left"/>
    </style:style>
    <style:style style:name="Table2.A" style:family="table-column">
      <style:table-column-properties style:column-width="3.136cm"/>
    </style:style>
    <style:style style:name="Table2.B" style:family="table-column">
      <style:table-column-properties style:column-width="7.636cm"/>
    </style:style>
    <style:style style:name="Table2.C" style:family="table-column">
      <style:table-column-properties style:column-width="6.228cm"/>
    </style:style>
    <style:style style:name="Table2.A1" style:family="table-cell">
      <style:table-cell-properties style:vertical-align="middle" fo:padding-left="0.318cm" fo:padding-right="0.318cm" fo:padding-top="0.212cm" fo:padding-bottom="0.212cm" fo:border="0.05pt solid #c4c7c5"/>
    </style:style>
    <style:style style:name="P1" style:family="paragraph" style:parent-style-name="Heading_20_1">
      <style:paragraph-properties fo:margin-left="0cm" fo:margin-right="0cm" fo:margin-top="0cm" fo:margin-bottom="0.247cm" style:contextual-spacing="false" fo:line-height="114%" fo:text-indent="0cm" style:auto-text-indent="false"/>
      <style:text-properties style:font-name="Google Sans"/>
    </style:style>
    <style:style style:name="P2"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fo:font-weight="bold"/>
    </style:style>
    <style:style style:name="P3" style:family="paragraph" style:parent-style-name="Heading_20_2">
      <style:paragraph-properties fo:margin-left="0cm" fo:margin-right="0cm" fo:margin-top="0cm" fo:margin-bottom="0.247cm" style:contextual-spacing="false" fo:line-height="114%" fo:text-indent="0cm" style:auto-text-indent="false"/>
      <style:text-properties style:font-name="Google Sans"/>
    </style:style>
    <style:style style:name="P4"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5" style:family="paragraph" style:parent-style-name="Text_20_body" style:list-style-name="L1">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6" style:family="paragraph" style:parent-style-name="Heading_20_3">
      <style:paragraph-properties fo:margin-left="0cm" fo:margin-right="0cm" fo:margin-top="0cm" fo:margin-bottom="0.247cm" style:contextual-spacing="false" fo:line-height="114%" fo:text-indent="0cm" style:auto-text-indent="false"/>
      <style:text-properties style:font-name="Google Sans"/>
    </style:style>
    <style:style style:name="P7" style:family="paragraph" style:parent-style-name="Text_20_body" style:list-style-name="L2">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8" style:family="paragraph" style:parent-style-name="Text_20_body">
      <style:paragraph-properties fo:margin-left="0cm" fo:margin-right="0cm" fo:margin-top="0cm" fo:margin-bottom="0.247cm" style:contextual-spacing="false" fo:line-height="114%" fo:text-indent="0cm" style:auto-text-indent="false"/>
    </style:style>
    <style:style style:name="P9" style:family="paragraph" style:parent-style-name="Heading_20_3">
      <style:text-properties style:font-name="Google Sans"/>
    </style:style>
    <style:style style:name="P10"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1" style:family="paragraph" style:parent-style-name="Heading_20_3">
      <style:paragraph-properties fo:margin-left="0cm" fo:margin-right="0cm" fo:margin-top="0cm" fo:margin-bottom="0.212cm" style:contextual-spacing="false" fo:line-height="114%" fo:text-indent="0cm" style:auto-text-indent="false"/>
      <style:text-properties style:font-name="Google Sans"/>
    </style:style>
    <style:style style:name="P12"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3"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4" style:family="paragraph" style:parent-style-name="Text_20_body" style:list-style-name="L6">
      <style:paragraph-properties fo:margin-left="0cm" fo:margin-right="0cm" fo:margin-top="0cm" fo:margin-bottom="0.247cm" style:contextual-spacing="false" fo:line-height="114%" fo:text-indent="0cm" style:auto-text-indent="false" fo:padding="0cm" fo:border="none"/>
      <style:text-properties style:font-name="Google Sans Text" fo:font-style="italic"/>
    </style:style>
    <style:style style:name="P15" style:family="paragraph" style:parent-style-name="Heading_20_4">
      <style:paragraph-properties fo:margin-left="0cm" fo:margin-right="0cm" fo:margin-top="0cm" fo:margin-bottom="0.247cm" style:contextual-spacing="false" fo:line-height="114%" fo:text-indent="0cm" style:auto-text-indent="false"/>
      <style:text-properties style:font-name="Google Sans"/>
    </style:style>
    <style:style style:name="P16" style:family="paragraph" style:parent-style-name="Text_20_body" style:list-style-name="L7">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7" style:family="paragraph" style:parent-style-name="Heading_20_4">
      <style:paragraph-properties fo:margin-left="0cm" fo:margin-right="0cm" fo:margin-top="0cm" fo:margin-bottom="0.212cm" style:contextual-spacing="false" fo:line-height="114%" fo:text-indent="0cm" style:auto-text-indent="false"/>
      <style:text-properties style:font-name="Google Sans"/>
    </style:style>
    <style:style style:name="P18" style:family="paragraph" style:parent-style-name="Table_20_Contents">
      <style:paragraph-properties fo:margin-left="0cm" fo:margin-right="0cm" fo:margin-top="0cm" fo:margin-bottom="0cm" style:contextual-spacing="false" fo:line-height="114%" fo:text-indent="0cm" style:auto-text-indent="false"/>
    </style:style>
    <style:style style:name="P19"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style>
    <style:style style:name="P20" style:family="paragraph" style:parent-style-name="Table_20_Contents">
      <style:paragraph-properties fo:margin-left="0cm" fo:margin-right="0cm" fo:margin-top="0cm" fo:margin-bottom="0.247cm" style:contextual-spacing="false" fo:line-height="114%" fo:text-indent="0cm" style:auto-text-indent="false"/>
    </style:style>
    <style:style style:name="P21" style:family="paragraph" style:parent-style-name="Text_20_body" style:list-style-name="L8">
      <style:paragraph-properties fo:margin-left="0cm" fo:margin-right="0cm" fo:margin-top="0cm" fo:margin-bottom="0.247cm" style:contextual-spacing="false" fo:line-height="114%" fo:text-indent="0cm" style:auto-text-indent="false" fo:padding="0cm" fo:border="none"/>
    </style:style>
    <style:style style:name="P22" style:family="paragraph" style:parent-style-name="Text_20_body" style:list-style-name="L9">
      <style:paragraph-properties fo:margin-left="0cm" fo:margin-right="0cm" fo:margin-top="0cm" fo:margin-bottom="0.247cm" style:contextual-spacing="false" fo:line-height="114%" fo:text-indent="0cm" style:auto-text-indent="false" fo:padding="0cm" fo:border="none"/>
    </style:style>
    <style:style style:name="P23" style:family="paragraph" style:parent-style-name="Text_20_body" style:list-style-name="L10">
      <style:paragraph-properties fo:margin-left="0cm" fo:margin-right="0cm" fo:margin-top="0cm" fo:margin-bottom="0.247cm" style:contextual-spacing="false" fo:line-height="114%" fo:text-indent="0cm" style:auto-text-indent="false" fo:padding="0cm" fo:border="none"/>
    </style:style>
    <style:style style:name="P24" style:family="paragraph" style:parent-style-name="Heading_20_3">
      <style:paragraph-properties fo:margin-left="0cm" fo:margin-right="0cm" fo:margin-top="0cm" fo:margin-bottom="0.212cm" style:contextual-spacing="false" fo:line-height="114%" fo:text-indent="0cm" style:auto-text-indent="false"/>
    </style:style>
    <style:style style:name="P25" style:family="paragraph" style:parent-style-name="Text_20_body" style:list-style-name="L11">
      <style:paragraph-properties fo:margin-left="0cm" fo:margin-right="0cm" fo:margin-top="0cm" fo:margin-bottom="0.247cm" style:contextual-spacing="false" fo:line-height="114%" fo:text-indent="0cm" style:auto-text-indent="false" fo:padding="0cm" fo:border="none"/>
    </style:style>
    <style:style style:name="P26" style:family="paragraph" style:parent-style-name="Text_20_body" style:list-style-name="L11">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27" style:family="paragraph" style:parent-style-name="Text_20_body" style:list-style-name="L12">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28" style:family="paragraph" style:parent-style-name="Text_20_body" style:list-style-name="L12">
      <style:paragraph-properties fo:margin-left="0cm" fo:margin-right="0cm" fo:margin-top="0cm" fo:margin-bottom="0.247cm" style:contextual-spacing="false" fo:line-height="114%" fo:text-indent="0cm" style:auto-text-indent="false" fo:padding="0cm" fo:border="none"/>
    </style:style>
    <style:style style:name="P29" style:family="paragraph" style:parent-style-name="Text_20_body" style:list-style-name="L13">
      <style:paragraph-properties fo:margin-left="0cm" fo:margin-right="0cm" fo:margin-top="0cm" fo:margin-bottom="0.247cm" style:contextual-spacing="false" fo:line-height="114%" fo:text-indent="0cm" style:auto-text-indent="false" fo:padding="0cm" fo:border="none"/>
    </style:style>
    <style:style style:name="P30" style:family="paragraph" style:parent-style-name="Text_20_body" style:list-style-name="L13">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31" style:family="paragraph" style:parent-style-name="Text_20_body" style:list-style-name="L14">
      <style:paragraph-properties fo:margin-left="0cm" fo:margin-right="0cm" fo:margin-top="0cm" fo:margin-bottom="0.247cm" style:contextual-spacing="false" fo:line-height="114%" fo:text-indent="0cm" style:auto-text-indent="false" fo:padding="0cm" fo:border="none"/>
    </style:style>
    <style:style style:name="P32" style:family="paragraph" style:parent-style-name="Text_20_body" style:list-style-name="L14">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33" style:family="paragraph" style:parent-style-name="Text_20_body" style:list-style-name="L15">
      <style:paragraph-properties fo:margin-left="0cm" fo:margin-right="0cm" fo:margin-top="0cm" fo:margin-bottom="0.247cm" style:contextual-spacing="false" fo:line-height="114%" fo:text-indent="0cm" style:auto-text-indent="false" fo:padding="0cm" fo:border="none"/>
    </style:style>
    <style:style style:name="P34" style:family="paragraph" style:parent-style-name="Text_20_body" style:list-style-name="L15">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35" style:family="paragraph" style:parent-style-name="Text_20_body" style:list-style-name="L16">
      <style:paragraph-properties fo:margin-left="0cm" fo:margin-right="0cm" fo:margin-top="0cm" fo:margin-bottom="0.247cm" style:contextual-spacing="false" fo:line-height="114%" fo:text-indent="0cm" style:auto-text-indent="false" fo:padding="0cm" fo:border="none"/>
    </style:style>
    <style:style style:name="P36" style:family="paragraph" style:parent-style-name="Text_20_body" style:list-style-name="L16">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37" style:family="paragraph" style:parent-style-name="Text_20_body" style:list-style-name="L17">
      <style:paragraph-properties fo:margin-left="0cm" fo:margin-right="0cm" fo:margin-top="0cm" fo:margin-bottom="0.247cm" style:contextual-spacing="false" fo:line-height="114%" fo:text-indent="0cm" style:auto-text-indent="false" fo:padding="0cm" fo:border="none"/>
    </style:style>
    <style:style style:name="P38" style:family="paragraph" style:parent-style-name="Text_20_body" style:list-style-name="L17">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39" style:family="paragraph" style:parent-style-name="Text_20_body" style:list-style-name="L18">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40" style:family="paragraph" style:parent-style-name="Text_20_body" style:list-style-name="L18">
      <style:paragraph-properties fo:margin-left="0cm" fo:margin-right="0cm" fo:margin-top="0cm" fo:margin-bottom="0.247cm" style:contextual-spacing="false" fo:line-height="114%" fo:text-indent="0cm" style:auto-text-indent="false" fo:padding="0cm" fo:border="none"/>
    </style:style>
    <style:style style:name="P41" style:family="paragraph" style:parent-style-name="Text_20_body" style:list-style-name="L19">
      <style:paragraph-properties fo:margin-left="0cm" fo:margin-right="0cm" fo:margin-top="0cm" fo:margin-bottom="0.247cm" style:contextual-spacing="false" fo:line-height="114%" fo:text-indent="0cm" style:auto-text-indent="false" fo:padding="0cm" fo:border="none"/>
    </style:style>
    <style:style style:name="P42" style:family="paragraph" style:parent-style-name="Text_20_body" style:list-style-name="L20">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43" style:family="paragraph" style:parent-style-name="Text_20_body" style:list-style-name="L20">
      <style:paragraph-properties fo:margin-left="0cm" fo:margin-right="0cm" fo:margin-top="0cm" fo:margin-bottom="0.247cm" style:contextual-spacing="false" fo:line-height="114%" fo:text-indent="0cm" style:auto-text-indent="false" fo:padding="0cm" fo:border="none"/>
    </style:style>
    <style:style style:name="P44" style:family="paragraph" style:parent-style-name="Text_20_body" style:list-style-name="L21">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45" style:family="paragraph" style:parent-style-name="Text_20_body" style:list-style-name="L21">
      <style:paragraph-properties fo:margin-left="0cm" fo:margin-right="0cm" fo:margin-top="0cm" fo:margin-bottom="0.247cm" style:contextual-spacing="false" fo:line-height="114%" fo:text-indent="0cm" style:auto-text-indent="false" fo:padding="0cm" fo:border="none"/>
    </style:style>
    <style:style style:name="P46" style:family="paragraph" style:parent-style-name="Text_20_body" style:list-style-name="L22">
      <style:paragraph-properties fo:margin-left="0cm" fo:margin-right="0cm" fo:margin-top="0cm" fo:margin-bottom="0.247cm" style:contextual-spacing="false" fo:line-height="114%" fo:text-indent="0cm" style:auto-text-indent="false" fo:padding="0cm" fo:border="none"/>
      <style:text-properties style:font-name="Google Sans Text" fo:font-weight="bold"/>
    </style:style>
    <style:style style:name="P47" style:family="paragraph" style:parent-style-name="Text_20_body" style:list-style-name="L22">
      <style:paragraph-properties fo:margin-left="0cm" fo:margin-right="0cm" fo:margin-top="0cm" fo:margin-bottom="0.247cm" style:contextual-spacing="false" fo:line-height="114%" fo:text-indent="0cm" style:auto-text-indent="false" fo:padding="0cm" fo:border="none"/>
    </style:style>
    <style:style style:name="P48" style:family="paragraph" style:parent-style-name="Text_20_body" style:list-style-name="L22">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49" style:family="paragraph" style:parent-style-name="Text_20_body" style:list-style-name="L23">
      <style:paragraph-properties fo:margin-left="0cm" fo:margin-right="0cm" fo:margin-top="0cm" fo:margin-bottom="0.247cm" style:contextual-spacing="false" fo:line-height="114%" fo:text-indent="0cm" style:auto-text-indent="false" fo:padding="0cm" fo:border="none"/>
    </style:style>
    <style:style style:name="P50" style:family="paragraph" style:parent-style-name="Text_20_body" style:list-style-name="L23">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51" style:family="paragraph" style:parent-style-name="Preformatted_20_Text">
      <style:paragraph-properties fo:margin-left="0cm" fo:margin-right="0cm" fo:margin-top="0cm" fo:margin-bottom="0cm" style:contextual-spacing="false" fo:line-height="114%" fo:text-indent="0cm" style:auto-text-indent="false"/>
    </style:style>
    <style:style style:name="P52" style:family="paragraph" style:parent-style-name="Preformatted_20_Text">
      <style:paragraph-properties fo:margin-top="0cm" fo:margin-bottom="0cm" style:contextual-spacing="false" fo:line-height="114%"/>
    </style:style>
    <style:style style:name="P53" style:family="paragraph" style:parent-style-name="Text_20_body" style:list-style-name="L24">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T1" style:family="text">
      <style:text-properties fo:font-weight="bold"/>
    </style:style>
    <style:style style:name="T2" style:family="text">
      <style:text-properties fo:font-style="italic"/>
    </style:style>
    <style:style style:name="T3" style:family="text">
      <style:text-properties style:font-name="Google Sans Text"/>
    </style:style>
    <style:style style:name="T4" style:family="text">
      <style:text-properties style:font-name="Google Sans Text" fo:font-weight="bold"/>
    </style:style>
    <style:style style:name="T5" style:family="text">
      <style:text-properties style:font-name="Google Sans Text" fo:font-style="italic"/>
    </style:style>
    <style:style style:name="T6" style:family="text">
      <style:text-properties style:font-name="Google San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rchitectural Blueprint: The Deterministic Chess Report Engine</text:h>
      <text:p text:style-name="P2">System Codex for "GM Chankya" Automated Commentary</text:p>
      <text:h text:style-name="P3" text:outline-level="2">1. Executive Summary &amp; Philosophy of Deterministic Chess Commentary</text:h>
      <text:p text:style-name="P4">The modern approach to chess analysis has become heavily reliant on generative artificial intelligence. While Large Language Models (LLMs) excel at creating fluid prose, they introduce substantial liabilities into the context of rigorous chess education: token cost, latency, hallucinated move orders, and an inability to reliably trace numerical evaluation changes to exact spatial patterns on the board.</text:p>
      <text:p text:style-name="P4">This document serves as the complete technical blueprint for a <text:span text:style-name="T1">Deterministic Chess Report Engine</text:span>. It eliminates generative AI entirely, replacing it with a complex, multi-layered <text:span text:style-name="T1">Rule-Based Expert System</text:span> that maps the structural outputs of the Stockfish engine directly to a massive, parameterized vocabulary matrix.</text:p>
      <text:p text:style-name="P4">By building an engine utilizing 2,000 to 3,000 hyper-specific prebuilt sentences, you achieve:</text:p>
      <text:list text:style-name="L1">
        <text:list-item>
          <text:p text:style-name="P5"><text:span text:style-name="T1">Zero Latency &amp; True Offline Execution:</text:span> Run analyses instantly on a local desktop or mobile device.</text:p>
        </text:list-item>
        <text:list-item>
          <text:p text:style-name="P5"><text:span text:style-name="T1">Absolute Factual Fidelity:</text:span> The engine cannot miscalculate or invent moves that never occurred; its statements are mathematically tied to the engine's data.</text:p>
        </text:list-item>
        <text:list-item>
          <text:p text:style-name="P5"><text:span text:style-name="T1">A Distinct, Consistent Educational Persona:</text:span> Every report sounds exactly like the resident head coach, <text:span text:style-name="T1">GM Chankya</text:span>, maintaining specific instructional frameworks, vocabulary preferences, and psychological coaching cues.</text:p>
        </text:list-item>
      </text:list>
      <text:p text:style-name="P4">The core engineering challenge is preventing the report from sounding mechanical or repetitive. This blueprint resolves that challenge through <text:span text:style-name="T1">combinatorial phrase mixing</text:span>, <text:span text:style-name="T1">evaluation-difference multi-gating</text:span>, and <text:span text:style-name="T1">state-tracking variables</text:span> that ensure fluid narrative progression from Move 1 to the endgame.</text:p>
      <text:h text:style-name="P3" text:outline-level="2">2. Coach Persona Profile: GM Chankya</text:h>
      <text:p text:style-name="P4">To construct a convincing template-driven report, the vocabulary must reflect a distinct psychological profile. "GM Chankya" is a seasoned Grandmaster whose commentary style combines classic positional principles with direct, no-nonsense tactical corrections.</text:p>
      <text:h text:style-name="P6" text:outline-level="3">Core Traits of GM Chankya's Analysis</text:h>
      <text:list text:style-name="L2">
        <text:list-item>
          <text:p text:style-name="P7"><text:span text:style-name="T1">Pragmatic and Materially Aware:</text:span> He despises "cheap tricks" or unjustified speculative sacrifices, preferring deep positional pressure, spatial dominance, and clean endgame conversions.</text:p>
        </text:list-item>
        <text:list-item>
          <text:p text:style-name="P7"><text:soft-page-break/><text:span text:style-name="T1">Structurally Obsessed:</text:span> He focuses heavily on pawn structures, emphasizing concepts like backward pawns, isolated queen pawns (IQP), hole creation, and pawn chains.</text:p>
        </text:list-item>
        <text:list-item>
          <text:p text:style-name="P7"><text:span text:style-name="T1">Strict But Instructive Tone:</text:span> When a blunder occurs, he doesn't just state the evaluation drop; he treats it as a psychological lapse, questioning the user's board vision or prophylaxis (preventative thinking).</text:p>
        </text:list-item>
        <text:list-item>
          <text:p text:style-name="P7"><text:span text:style-name="T1">Idiomatic Vocabulary:</text:span> He frequently uses specific terminology: <text:span text:style-name="T2">"Prophylaxis," "Catastrophe," "Positional Asphyxiation," "The Principle of Two Weaknesses," "Surgical Precision," "An Outpost Worthy of a Knight."</text:span></text:p>
        </text:list-item>
      </text:list>
      <text:h text:style-name="P3" text:outline-level="2">3. Core Data Inputs &amp; The Stockfish State Vector</text:h>
      <text:p text:style-name="P8"><text:span text:style-name="T3">A single numerical evaluation score (e.g., </text:span><text:span text:style-name="Source_20_Text"><text:span text:style-name="T3">+1.20</text:span></text:span><text:span text:style-name="T3">) is insufficient to generate a rich, contextual report sentence. To drive a complex phrase matrix, the engine must ingest a multi-dimensional data stream from Stockfish and the chess engine parser for each move. We call this the </text:span><text:span text:style-name="T4">State Vector ($V_s$)</text:span><text:span text:style-name="T3">.</text:span></text:p>
      <text:p text:style-name="P4">The State Vector consists of the following parameters, extracted from the Universal Chess Interface (UCI) output and the game notation (PGN):</text:p>
      <text:p text:style-name="Standard">[ STATE VECTOR INPUTS ] +-------------------------------------------------------------+ | 1. Eval Score (Cp) | 4. Phase (Open/Mid/End) | | 2. Delta Eval (ΔCp) | 5. Piece Type Affected | | 3. Absolute Depth | 6. Tactical Motifs (Fork/Pin) | +-------------------------------------------------------------+</text:p>
      <text:p text:style-name="Standard"/>
      <text:h text:style-name="P9" text:outline-level="3">1. The Raw Evaluation Score (<text:span text:style-name="T3">$Cp$</text:span>)</text:h>
      <text:p text:style-name="P4">Expressed in centipawns (where 100 centipawns = 1 pawn value) or Mate-in-X ($M_x$).</text:p>
      <text:list text:style-name="L3">
        <text:list-item>
          <text:p text:style-name="P10">Positive values indicate a White advantage; negative values favor Black.</text:p>
        </text:list-item>
      </text:list>
      <text:h text:style-name="P11" text:outline-level="3">2. The Evaluation Delta (<text:span text:style-name="T3">$\Delta Cp$</text:span>)</text:h>
      <text:p text:style-name="P4">The mathematical difference between the evaluation <text:span text:style-name="T2">before</text:span> the move and <text:span text:style-name="T2">after</text:span> the move:</text:p>
      <text:p text:style-name="P4">$$\Delta Cp = Cp_{current} - Cp_{previous}$$</text:p>
      <text:list text:style-name="L4">
        <text:list-item>
          <text:p text:style-name="P12">This parameter is the ultimate trigger for identifying blunders, mistakes, brilliant moves, or missed opportunities.</text:p>
        </text:list-item>
      </text:list>
      <text:h text:style-name="P11" text:outline-level="3">3. Game Phase Indicator (<text:span text:style-name="T3">$P$</text:span>)</text:h>
      <text:list text:style-name="L5">
        <text:list-item>
          <text:p text:style-name="P13"><text:span text:style-name="T1">Opening:</text:span> Move 1 to book exit or until queens/minor pieces break initial configurations.</text:p>
        </text:list-item>
        <text:list-item>
          <text:p text:style-name="P13"><text:span text:style-name="T1">Middlegame:</text:span> Heavy material on board, active planning, king safety concerns.</text:p>
        </text:list-item>
        <text:list-item>
          <text:p text:style-name="P13"><text:span text:style-name="T1">Endgame:</text:span> Queens traded, or total piece count $\le 6$ (excluding pawns).</text:p>
        </text:list-item>
      </text:list>
      <text:h text:style-name="P11" text:outline-level="3">4. Piece and Square Coordinate Vector (<text:span text:style-name="T3">$C$</text:span>)</text:h>
      <text:p text:style-name="P8"><text:span text:style-name="T3">Tracks which piece moved, its origin square, and its destination square (e.g., </text:span><text:span text:style-name="Source_20_Text"><text:span text:style-name="T3">Nf3</text:span></text:span><text:span text:style-name="T3">, </text:span><text:span text:style-name="Source_20_Text"><text:span text:style-name="T3">Bxf7+</text:span></text:span><text:span text:style-name="T3">). It extracts the specific board zone: </text:span><text:span text:style-name="T5">Kingside, Queenside, Center.</text:span></text:p>
      <text:h text:style-name="P11" text:outline-level="3"><text:soft-page-break/>5. Tactical/Structural Tags (<text:span text:style-name="T3">$T$</text:span>)</text:h>
      <text:p text:style-name="P4">Derived from basic static board calculations or Stockfish threat lines:</text:p>
      <text:list text:style-name="L6">
        <text:list-item>
          <text:p text:style-name="P14">Pins, forks, skewers, discovered attacks, passed pawns, doubled pawns, isolated pawns, weak squares (holes).</text:p>
        </text:list-item>
      </text:list>
      <text:h text:style-name="P3" text:outline-level="2">4. The Layered Decision Engine: Logic Gates &amp; Matrix</text:h>
      <text:p text:style-name="P4">To convert the raw State Vector into a specific sentence bucket, the engine passes the variables through a series of hierarchical conditional filters (Logic Gates). This ensures that the engine doesn't just pick a sentence at random, but isolates the <text:span text:style-name="T2">exact psychological and tactical meaning</text:span> of the position.</text:p>
      <text:p text:style-name="Standard">The Decision Gate Hierarchy</text:p>
      <text:p text:style-name="Standard"/>
      <text:p text:style-name="Standard">[State Vector Ingested] │ ▼ ┌───────────────┐ │ GATE 1 │ ──► Is there a Mate Threat or Absolute Forced Line? └───────────────┘ │ No ▼ ┌───────────────┐ │ GATE 2 │ ──► Evaluate ΔCp: Did this move drastically change the evaluation? └───────────────┘ (Blunder, Mistake, Inaccuracy, Excellent, Brilliant) │ ├───────────────────────────────┐ ▼ (High ΔCp / Error or Brilliance) ▼ (Low ΔCp / Maintain Balance) ┌───────────────┐ ┌───────────────┐ │ GATE 3A │ │ GATE 3B │ │ Identify the │ │ Identify the │ │ Tactical Error│ │ Strategic Context └───────────────┘ └───────────────┘ │ │ ▼ ▼ ┌───────────────────────────────────────────────┐ │ GATE 4 │ ──► Phase Filtering │ (Isolate Opening, Middlegame, or Endgame)│ └───────────────────────────────────────────────┘ │ ▼ ┌───────────────────────────────────────────────┐ │ GATE 5 │ ──► Persona Randomizer (1 of 10 variations) │ (Select Final Output String) │ └───────────────────────────────────────────────┘</text:p>
      <text:p text:style-name="Standard"/>
      <text:p text:style-name="Standard"/>
      <text:h text:style-name="P9" text:outline-level="3">Detailed Logic Gate Specifications</text:h>
      <text:h text:style-name="P15" text:outline-level="4">Gate 1: Critical Condition Check</text:h>
      <text:list text:style-name="L7">
        <text:list-item>
          <text:p text:style-name="P16"><text:span text:style-name="T2">Condition:</text:span> If $Cp$ indicates Mate-in-X ($M_x$).</text:p>
        </text:list-item>
        <text:list-item>
          <text:p text:style-name="P16"><text:span text:style-name="T2">Branch A (Friendly Mate):</text:span> If $M$ is positive for the active player $\rightarrow$ Route to <text:span text:style-name="T1">[Triumphant Finish Matrix]</text:span>.</text:p>
        </text:list-item>
        <text:list-item>
          <text:p text:style-name="P16"><text:span text:style-name="T2">Branch B (Hostile Mate):</text:span> If $M$ is negative for the active player $\rightarrow$ Route to <text:span text:style-name="T1">[Catastrophe/Survival Matrix]</text:span>.</text:p>
        </text:list-item>
      </text:list>
      <text:h text:style-name="P17" text:outline-level="4">Gate 2: The Delta Threshold Gate (<text:span text:style-name="T3">$\Delta Cp$</text:span>)</text:h>
      <text:p text:style-name="P4">This gate determines the emotional tone of GM Chankya’s commentary by analyzing how much equity was gained or lost by the move.</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8"><text:span text:style-name="Strong_20_Emphasis"><text:span text:style-name="T3">Threshold Value (ΔCp)</text:span></text:span></text:p>
            </table:table-cell>
            <table:table-cell table:style-name="Table1.A1" office:value-type="string">
              <text:p text:style-name="P18"><text:span text:style-name="Strong_20_Emphasis"><text:span text:style-name="T3">Move Classification</text:span></text:span></text:p>
            </table:table-cell>
            <table:table-cell table:style-name="Table1.A1" office:value-type="string">
              <text:p text:style-name="P18"><text:span text:style-name="Strong_20_Emphasis"><text:span text:style-name="T3">Triggered Vocabulary Sub-Matrix</text:span></text:span></text:p>
            </table:table-cell>
          </table:table-row>
        </table:table-header-rows>
        <table:table-row>
          <table:table-cell table:style-name="Table1.A1" office:value-type="string">
            <text:p text:style-name="P19">$\ge +150$</text:p>
          </table:table-cell>
          <table:table-cell table:style-name="Table1.A1" office:value-type="string">
            <text:p text:style-name="P19">Brilliant/Surgical</text:p>
          </table:table-cell>
          <table:table-cell table:style-name="Table1.A1" office:value-type="string">
            <text:p text:style-name="P20"><text:span text:style-name="Source_20_Text"><text:span text:style-name="T3">M_BRILLIANT_CONVERSION</text:span></text:span></text:p>
          </table:table-cell>
        </table:table-row>
        <text:soft-page-break/>
        <table:table-row>
          <table:table-cell table:style-name="Table1.A1" office:value-type="string">
            <text:p text:style-name="P19">$+50 \text{ to } +149$</text:p>
          </table:table-cell>
          <table:table-cell table:style-name="Table1.A1" office:value-type="string">
            <text:p text:style-name="P19">Excellent/Strong</text:p>
          </table:table-cell>
          <table:table-cell table:style-name="Table1.A1" office:value-type="string">
            <text:p text:style-name="P20"><text:span text:style-name="Source_20_Text"><text:span text:style-name="T3">M_STRONG_POSITIONAL</text:span></text:span></text:p>
          </table:table-cell>
        </table:table-row>
        <table:table-row>
          <table:table-cell table:style-name="Table1.A1" office:value-type="string">
            <text:p text:style-name="P19">$-25 \text{ to } +49$</text:p>
          </table:table-cell>
          <table:table-cell table:style-name="Table1.A1" office:value-type="string">
            <text:p text:style-name="P19">Balanced/Consistent</text:p>
          </table:table-cell>
          <table:table-cell table:style-name="Table1.A1" office:value-type="string">
            <text:p text:style-name="P20"><text:span text:style-name="Source_20_Text"><text:span text:style-name="T3">M_MAINTAIN_BALANCE</text:span></text:span></text:p>
          </table:table-cell>
        </table:table-row>
        <table:table-row>
          <table:table-cell table:style-name="Table1.A1" office:value-type="string">
            <text:p text:style-name="P19">$-50 \text{ to } -119$</text:p>
          </table:table-cell>
          <table:table-cell table:style-name="Table1.A1" office:value-type="string">
            <text:p text:style-name="P19">Inaccuracy</text:p>
          </table:table-cell>
          <table:table-cell table:style-name="Table1.A1" office:value-type="string">
            <text:p text:style-name="P20"><text:span text:style-name="Source_20_Text"><text:span text:style-name="T3">M_INACCURACY_PROPHYLAXIS</text:span></text:span></text:p>
          </table:table-cell>
        </table:table-row>
        <table:table-row>
          <table:table-cell table:style-name="Table1.A1" office:value-type="string">
            <text:p text:style-name="P19">$-120 \text{ to } -299$</text:p>
          </table:table-cell>
          <table:table-cell table:style-name="Table1.A1" office:value-type="string">
            <text:p text:style-name="P19">Mistake</text:p>
          </table:table-cell>
          <table:table-cell table:style-name="Table1.A1" office:value-type="string">
            <text:p text:style-name="P20"><text:span text:style-name="Source_20_Text"><text:span text:style-name="T3">M_MISTAKE_TACTICAL</text:span></text:span></text:p>
          </table:table-cell>
        </table:table-row>
        <table:table-row>
          <table:table-cell table:style-name="Table1.A1" office:value-type="string">
            <text:p text:style-name="P19">$\le -300$</text:p>
          </table:table-cell>
          <table:table-cell table:style-name="Table1.A1" office:value-type="string">
            <text:p text:style-name="P19">Blunder</text:p>
          </table:table-cell>
          <table:table-cell table:style-name="Table1.A1" office:value-type="string">
            <text:p text:style-name="P20"><text:span text:style-name="Source_20_Text"><text:span text:style-name="T3">M_BLUNDER_CATASTROPHE</text:span></text:span></text:p>
          </table:table-cell>
        </table:table-row>
      </table:table>
      <text:h text:style-name="P15" text:outline-level="4">Gate 3A: Tactical Root Cause Isolation (For High Deltas)</text:h>
      <text:p text:style-name="P4">If Gate 2 routes to a Mistake or Blunder, Gate 3A scans the structural changes to pinpoint <text:span text:style-name="T2">why</text:span> the evaluation dropped:</text:p>
      <text:list text:style-name="L8">
        <text:list-item>
          <text:p text:style-name="P21"><text:span text:style-name="T5">Sub-Gate 3A-1:</text:span><text:span text:style-name="T3"> Did material count drop without compensation? $\rightarrow$ Tag: </text:span><text:span text:style-name="Source_20_Text"><text:span text:style-name="T3">MATERIAL_HANGING</text:span></text:span><text:span text:style-name="T3">.</text:span></text:p>
        </text:list-item>
        <text:list-item>
          <text:p text:style-name="P21"><text:span text:style-name="T5">Sub-Gate 3A-2:</text:span><text:span text:style-name="T3"> Did an enemy piece move to a square creating a simultaneous threat on two items? $\rightarrow$ Tag: </text:span><text:span text:style-name="Source_20_Text"><text:span text:style-name="T3">TACTICAL_FORK</text:span></text:span><text:span text:style-name="T3">.</text:span></text:p>
        </text:list-item>
        <text:list-item>
          <text:p text:style-name="P21"><text:span text:style-name="T5">Sub-Gate 3A-3:</text:span><text:span text:style-name="T3"> Did a piece step into an alignment with a higher-value piece behind it? $\rightarrow$ Tag: </text:span><text:span text:style-name="Source_20_Text"><text:span text:style-name="T3">PIECE_PIN</text:span></text:span><text:span text:style-name="T3">.</text:span></text:p>
        </text:list-item>
      </text:list>
      <text:h text:style-name="P15" text:outline-level="4">Gate 3B: Positional Feature Extraction (For Low/Stable Deltas)</text:h>
      <text:p text:style-name="P4">If the move maintains structural balance, Gate 3B identifies what positional feature was enhanced or mitigated:</text:p>
      <text:list text:style-name="L9">
        <text:list-item>
          <text:p text:style-name="P22"><text:span text:style-name="T5">Sub-Gate 3B-1:</text:span><text:span text:style-name="T3"> Center control changes (pawns occupying $d4, e4, d5, e5$). $\rightarrow$ Tag: </text:span><text:span text:style-name="Source_20_Text"><text:span text:style-name="T3">CENTER_DOMINANCE</text:span></text:span><text:span text:style-name="T3">.</text:span></text:p>
        </text:list-item>
        <text:list-item>
          <text:p text:style-name="P22"><text:span text:style-name="T5">Sub-Gate 3B-2:</text:span><text:span text:style-name="T3"> Pawn structure alteration (creation of an isolated or doubled pawn). $\rightarrow$ Tag: </text:span><text:span text:style-name="Source_20_Text"><text:span text:style-name="T3">PAWN_STRUCTURE</text:span></text:span><text:span text:style-name="T3">.</text:span></text:p>
        </text:list-item>
        <text:list-item>
          <text:p text:style-name="P22"><text:span text:style-name="T5">Sub-Gate 3B-3:</text:span><text:span text:style-name="T3"> Piece activation (a minor piece moves from the back rank to an active outpost). $\rightarrow$ Tag: </text:span><text:span text:style-name="Source_20_Text"><text:span text:style-name="T3">PIECE_ACTIVATION</text:span></text:span><text:span text:style-name="T3">.</text:span></text:p>
        </text:list-item>
      </text:list>
      <text:h text:style-name="P15" text:outline-level="4">Gate 4: Phase Context Filter</text:h>
      <text:p text:style-name="P4">The engine applies a final contextual overlay based on the move number and piece placement:</text:p>
      <text:list text:style-name="L10">
        <text:list-item>
          <text:p text:style-name="P23"><text:span text:style-name="Source_20_Text"><text:span text:style-name="T3">PHASE_OPENING</text:span></text:span><text:span text:style-name="T3">, </text:span><text:span text:style-name="Source_20_Text"><text:span text:style-name="T3">PHASE_MIDDLEGAME</text:span></text:span><text:span text:style-name="T3">, </text:span><text:span text:style-name="Source_20_Text"><text:span text:style-name="T3">PHASE_ENDGAME</text:span></text:span><text:span text:style-name="T3">.</text:span></text:p>
        </text:list-item>
      </text:list>
      <text:h text:style-name="P15" text:outline-level="4"><text:soft-page-break/>Gate 5: The Expression Selector &amp; Randomization</text:h>
      <text:p text:style-name="P4">To ensure the report does not feel robotic across multi-game analyses, every distinct intersection of Gates 1–4 maps to a pool of at least <text:span text:style-name="T1">10 distinct semantic variations</text:span> written in GM Chankya's unique style. The engine pulls one at random or sequences them to avoid back-to-back phrase reuse.</text:p>
      <text:h text:style-name="P3" text:outline-level="2">5. Comprehensive Tactical &amp; Strategic Phrase Library</text:h>
      <text:p text:style-name="P8"><text:span text:style-name="T3">This section defines the semantic database across the core matrices. It contains the exact structural templates, dynamic parameters (wrapped in brackets like </text:span><text:span text:style-name="Source_20_Text"><text:span text:style-name="T3">[Player]</text:span></text:span><text:span text:style-name="T3">, </text:span><text:span text:style-name="Source_20_Text"><text:span text:style-name="T3">[Square]</text:span></text:span><text:span text:style-name="T3">), and the instructional logic underlying GM Chankya's coaching philosophy.</text:span></text:p>
      <text:h text:style-name="P24" text:outline-level="3"><text:span text:style-name="T6">Matrix A: The Opening Phase (</text:span><text:span text:style-name="Source_20_Text"><text:span text:style-name="T3">PHASE_OPENING</text:span></text:span><text:span text:style-name="T6">)</text:span></text:h>
      <text:p text:style-name="P4">The focus in this matrix is on development speed, classical principles, theoretical accuracy, and early center control. GM Chankya hates wasting time in the opening.</text:p>
      <text:h text:style-name="P15" text:outline-level="4">1. High Theoretical Conformity (Book Moves, Stable Evaluation)</text:h>
      <text:list text:style-name="L11">
        <text:list-item>
          <text:p text:style-name="P25"><text:span text:style-name="T4">Phrase Variant A1:</text:span><text:span text:style-name="T3"> "A perfectly respectable choice here. By securing control over the center early, </text:span><text:span text:style-name="Source_20_Text"><text:span text:style-name="T3">[Player]</text:span></text:span><text:span text:style-name="T3"> is laying down a healthy foundations for the middlegame. No need to reinvent the wheel."</text:span></text:p>
        </text:list-item>
        <text:list-item>
          <text:p text:style-name="P25"><text:span text:style-name="T4">Phrase Variant A2:</text:span><text:span text:style-name="T3"> "Classic textbook chess. </text:span><text:span text:style-name="Source_20_Text"><text:span text:style-name="T3">[Move]</text:span></text:span><text:span text:style-name="T3"> complies completely with structural principles—developing a piece while staking a claim in the critical central sector."</text:span></text:p>
        </text:list-item>
        <text:list-item>
          <text:p text:style-name="P26"><text:span text:style-name="T1">Phrase Variant A3:</text:span> "GM Chankya approves. This move preserves the elasticity of the pawn structure, keeping options open while quietly asking the opponent to reveal their intentions."</text:p>
        </text:list-item>
        <text:list-item>
          <text:p text:style-name="P25"><text:span text:style-name="T4">Phrase Variant A4:</text:span><text:span text:style-name="T3"> "Sound development. </text:span><text:span text:style-name="Source_20_Text"><text:span text:style-name="T3">[Player]</text:span></text:span><text:span text:style-name="T3"> prioritizes the minor pieces before embarking on any speculative excursions on the flanks. This is how solid chess is played."</text:span></text:p>
        </text:list-item>
        <text:list-item>
          <text:p text:style-name="P26"><text:span text:style-name="T1">Phrase Variant A5:</text:span> "An elegant step. This line follows deep theoretical paths, aiming to slowly squeeze the opponent out of comfortable squares."</text:p>
        </text:list-item>
        <text:list-item>
          <text:p text:style-name="P26"><text:span text:style-name="T1">Phrase Variant A6:</text:span> "Maintaining structural harmony. The piece slips naturally into the development chain, safeguarding the king's future home."</text:p>
        </text:list-item>
        <text:list-item>
          <text:p text:style-name="P26"><text:span text:style-name="T1">Phrase Variant A7:</text:span> "A standard weapon in this structure. It establishes a dynamic balance, challenging the opponent to prove they have an antidote."</text:p>
        </text:list-item>
        <text:list-item>
          <text:p text:style-name="P25"><text:span text:style-name="T4">Phrase Variant A8:</text:span><text:span text:style-name="T3"> "Patient, fundamental chess. </text:span><text:span text:style-name="Source_20_Text"><text:span text:style-name="T3">[Player]</text:span></text:span><text:span text:style-name="T3"> avoids early, superficial aggression in favor of structural integrity."</text:span></text:p>
        </text:list-item>
        <text:list-item>
          <text:p text:style-name="P25"><text:span text:style-name="T4">Phrase Variant A9:</text:span><text:span text:style-name="T3"> "This setup is structurally resilient. By reinforcing </text:span><text:span text:style-name="Source_20_Text"><text:span text:style-name="T3">[Square]</text:span></text:span><text:span text:style-name="T3">, White ensures that no immediate tactical surprises can disrupt the development layout."</text:span></text:p>
        </text:list-item>
        <text:list-item>
          <text:p text:style-name="P26"><text:span text:style-name="T1">Phrase Variant A10:</text:span> "Clean, unpretentious development. It commands respect without overextending a single pawn."</text:p>
        </text:list-item>
      </text:list>
      <text:h text:style-name="P15" text:outline-level="4"><text:soft-page-break/>2. Early Inaccuracies (Wasting Tempos, Premature Queen Outings)</text:h>
      <text:list text:style-name="L12">
        <text:list-item>
          <text:p text:style-name="P27"><text:span text:style-name="T1">Phrase Variant B1:</text:span> "A severe violation of opening principles. Moving the same piece twice before the rest of the army has left the back rank is an invitation to trouble."</text:p>
        </text:list-item>
        <text:list-item>
          <text:p text:style-name="P28"><text:span text:style-name="T4">Phrase Variant B2:</text:span><text:span text:style-name="T3"> "Premature enthusiasm. Bringing the queen out to </text:span><text:span text:style-name="Source_20_Text"><text:span text:style-name="T3">[Square]</text:span></text:span><text:span text:style-name="T3"> this early makes her a massive target for enemy minor pieces. </text:span><text:span text:style-name="Source_20_Text"><text:span text:style-name="T3">[Player]</text:span></text:span><text:span text:style-name="T3"> is giving away free tempos."</text:span></text:p>
        </text:list-item>
        <text:list-item>
          <text:p text:style-name="P28"><text:span text:style-name="T4">Phrase Variant B3:</text:span><text:span text:style-name="T3"> "A positional luxury that </text:span><text:span text:style-name="Source_20_Text"><text:span text:style-name="T3">[Player]</text:span></text:span><text:span text:style-name="T3"> simply cannot afford. In the opening, speed is everything; this slow pawn push on the flank ignores the burning fires in the center."</text:span></text:p>
        </text:list-item>
        <text:list-item>
          <text:p text:style-name="P27"><text:span text:style-name="T1">Phrase Variant B4:</text:span> "This move lacks dynamic urgency. While it doesn't drop material, it allows the opponent an unearned opportunity to seize control of the central squares."</text:p>
        </text:list-item>
        <text:list-item>
          <text:p text:style-name="P28"><text:span text:style-name="T4">Phrase Variant B5:</text:span><text:span text:style-name="T3"> "An erratic choice by </text:span><text:span text:style-name="Source_20_Text"><text:span text:style-name="T3">[Player]</text:span></text:span><text:span text:style-name="T3">. Developing minor pieces to passive squares like </text:span><text:span text:style-name="Source_20_Text"><text:span text:style-name="T3">[Square]</text:span></text:span><text:span text:style-name="T3"> congests the back rank and suffocates the natural coordination of the rooks."</text:span></text:p>
        </text:list-item>
        <text:list-item>
          <text:p text:style-name="P27"><text:span text:style-name="T1">Phrase Variant B6:</text:span> "A superficial threat that is easily defused. GM Chankya always teaches: do not make a move that your opponent can answer with a developing move that improves their position."</text:p>
        </text:list-item>
        <text:list-item>
          <text:p text:style-name="P27"><text:span text:style-name="T1">Phrase Variant B7:</text:span> "Neglecting prophylaxis. This passive retreat signals an unforced psychological submission early in the duel."</text:p>
        </text:list-item>
        <text:list-item>
          <text:p text:style-name="P28"><text:span text:style-name="T4">Phrase Variant B8:</text:span><text:span text:style-name="T3"> "An awkward square for the </text:span><text:span text:style-name="Source_20_Text"><text:span text:style-name="T3">[Piece]</text:span></text:span><text:span text:style-name="T3">. It blocks the natural path of the surrounding pawns, creating an unforced bottleneck in the camp."</text:span></text:p>
        </text:list-item>
        <text:list-item>
          <text:p text:style-name="P28"><text:span text:style-name="T4">Phrase Variant B9:</text:span><text:span text:style-name="T3"> "Too cautious! This move creates an early structural hole on </text:span><text:span text:style-name="Source_20_Text"><text:span text:style-name="T3">[Square]</text:span></text:span><text:span text:style-name="T3"> that a skilled tactician will exploit fifty moves down the line."</text:span></text:p>
        </text:list-item>
        <text:list-item>
          <text:p text:style-name="P28"><text:span text:style-name="T4">Phrase Variant B10:</text:span><text:span text:style-name="T3"> "A clear misdirection. </text:span><text:span text:style-name="Source_20_Text"><text:span text:style-name="T3">[Player]</text:span></text:span><text:span text:style-name="T3"> is playing as if the board is empty, completely ignoring the operational threats building in the core of the position."</text:span></text:p>
        </text:list-item>
      </text:list>
      <text:h text:style-name="P24" text:outline-level="3"><text:span text:style-name="T6">Matrix B: Middlegame Positional &amp; Strategic Matrix (</text:span><text:span text:style-name="Source_20_Text"><text:span text:style-name="T3">PHASE_MIDDLEGAME</text:span></text:span><text:span text:style-name="T6">)</text:span></text:h>
      <text:p text:style-name="P4">This matrix triggers when evaluations are stable but deep strategic ideas are being executed. It evaluates space, square control, pawn structures, and piece quality.</text:p>
      <text:h text:style-name="P15" text:outline-level="4">1. Outpost Creation &amp; Piece Optimization</text:h>
      <text:list text:style-name="L13">
        <text:list-item>
          <text:p text:style-name="P29"><text:span text:style-name="T4">Phrase Variant C1:</text:span><text:span text:style-name="T3"> "Magnificent placement. The </text:span><text:span text:style-name="Source_20_Text"><text:span text:style-name="T3">[Piece]</text:span></text:span><text:span text:style-name="T3"> anchors itself firmly onto the </text:span><text:span text:style-name="Source_20_Text"><text:span text:style-name="T3">[Square]</text:span></text:span><text:span text:style-name="T3"> outpost—a pristine operational base that will radiate immense pressure across the enemy camp."</text:span></text:p>
        </text:list-item>
        <text:list-item>
          <text:p text:style-name="P29"><text:span text:style-name="T4">Phrase Variant C2:</text:span><text:span text:style-name="T3"> "A masterful positional repositioning. The </text:span><text:span text:style-name="Source_20_Text"><text:span text:style-name="T3">[Piece]</text:span></text:span><text:span text:style-name="T3"> was doing nothing on its old square; now, it acts as a central coordinator, paralyzing the opponent's defensive options."</text:span></text:p>
        </text:list-item>
        <text:list-item>
          <text:p text:style-name="P29"><text:soft-page-break/><text:span text:style-name="T4">Phrase Variant C3:</text:span><text:span text:style-name="T3"> "Surgical precision. </text:span><text:span text:style-name="Source_20_Text"><text:span text:style-name="T3">[Player]</text:span></text:span><text:span text:style-name="T3"> identifies the structural hole on </text:span><text:span text:style-name="Source_20_Text"><text:span text:style-name="T3">[Square]</text:span></text:span><text:span text:style-name="T3"> and immediately occupies it. That </text:span><text:span text:style-name="Source_20_Text"><text:span text:style-name="T3">[Piece]</text:span></text:span><text:span text:style-name="T3"> cannot be evicted by a pawn, making it a permanent thorn."</text:span></text:p>
        </text:list-item>
        <text:list-item>
          <text:p text:style-name="P29"><text:span text:style-name="T4">Phrase Variant C4:</text:span><text:span text:style-name="T3"> "This is textbook positional asphyxiation. Step by step, piece by piece, </text:span><text:span text:style-name="Source_20_Text"><text:span text:style-name="T3">[Player]</text:span></text:span><text:span text:style-name="T3"> is restricting the oxygen supply of the opponent's army."</text:span></text:p>
        </text:list-item>
        <text:list-item>
          <text:p text:style-name="P30"><text:span text:style-name="T1">Phrase Variant C5:</text:span> "An excellent re-routing maneuver. It exemplifies the patient preparation GM Chankya preaches—improving the worst-placed piece before starting an assault."</text:p>
        </text:list-item>
        <text:list-item>
          <text:p text:style-name="P29"><text:span text:style-name="T4">Phrase Variant C6:</text:span><text:span text:style-name="T3"> "Dominating the open file. By placing the rook on </text:span><text:span text:style-name="Source_20_Text"><text:span text:style-name="T3">[Square]</text:span></text:span><text:span text:style-name="T3">, </text:span><text:span text:style-name="Source_20_Text"><text:span text:style-name="T3">[Player]</text:span></text:span><text:span text:style-name="T3"> establishes an open highway directly into the enemy's soft underbelly."</text:span></text:p>
        </text:list-item>
        <text:list-item>
          <text:p text:style-name="P29"><text:span text:style-name="T4">Phrase Variant C7:</text:span><text:span text:style-name="T3"> "A beautiful demonstration of piece harmony. Every element of </text:span><text:span text:style-name="Source_20_Text"><text:span text:style-name="T3">[Player]</text:span></text:span><text:span text:style-name="T3">’s setup is working toward a singular strategic objective."</text:span></text:p>
        </text:list-item>
        <text:list-item>
          <text:p text:style-name="P30"><text:span text:style-name="T1">Phrase Variant C8:</text:span> "Increasing the strategic tension. Instead of rushing into a premature trade, this move maintains a powerful threat, forcing the opponent to sweat."</text:p>
        </text:list-item>
        <text:list-item>
          <text:p text:style-name="P30"><text:span text:style-name="T1">Phrase Variant C9:</text:span> "An astute defensive-prophylactic move. It anticipates the opponent's counterplay on the queenside and shuts it down before it can breathe."</text:p>
        </text:list-item>
        <text:list-item>
          <text:p text:style-name="P29"><text:span text:style-name="T4">Phrase Variant C10:</text:span><text:span text:style-name="T3"> "A high-level positional decision. </text:span><text:span text:style-name="Source_20_Text"><text:span text:style-name="T3">[Player]</text:span></text:span><text:span text:style-name="T3"> exchanges a flashy attacking piece to permanently cripple the opponent's long-term pawn skeleton."</text:span></text:p>
        </text:list-item>
      </text:list>
      <text:h text:style-name="P15" text:outline-level="4">2. Structural Degradation (Creating Weaknesses, Holes, Bad Pawns)</text:h>
      <text:list text:style-name="L14">
        <text:list-item>
          <text:p text:style-name="P31"><text:span text:style-name="T4">Phrase Variant D1:</text:span><text:span text:style-name="T3"> "A strategic blunder that will haunt </text:span><text:span text:style-name="Source_20_Text"><text:span text:style-name="T3">[Player]</text:span></text:span><text:span text:style-name="T3"> for the rest of the game. Crippling the pawn skeleton with this unforced capture creates a permanently isolated pawn on </text:span><text:span text:style-name="Source_20_Text"><text:span text:style-name="T3">[Square]</text:span></text:span><text:span text:style-name="T3">."</text:span></text:p>
        </text:list-item>
        <text:list-item>
          <text:p text:style-name="P31"><text:span text:style-name="T4">Phrase Variant D2:</text:span><text:span text:style-name="T3"> "This pawn push is an act of structural self-sabotage. It leaves behind a gaping hole on </text:span><text:span text:style-name="Source_20_Text"><text:span text:style-name="T3">[Square]</text:span></text:span><text:span text:style-name="T3"> that will serve as a luxurious holiday home for an enemy knight."</text:span></text:p>
        </text:list-item>
        <text:list-item>
          <text:p text:style-name="P31"><text:span text:style-name="T4">Phrase Variant D3:</text:span><text:span text:style-name="T3"> "Unforced panic. By altering the pawn tension this way, </text:span><text:span text:style-name="Source_20_Text"><text:span text:style-name="T3">[Player]</text:span></text:span><text:span text:style-name="T3"> transforms a dynamic, healthy pawn structure into a rigid, backward mess that requires constant protection."</text:span></text:p>
        </text:list-item>
        <text:list-item>
          <text:p text:style-name="P31"><text:span text:style-name="T4">Phrase Variant D4:</text:span><text:span text:style-name="T3"> "An short-sighted trade. Giving up the prized bishop leaves </text:span><text:span text:style-name="Source_20_Text"><text:span text:style-name="T3">[Player]</text:span></text:span><text:span text:style-name="T3">’s complex of dark squares dangerously naked and prone to deep infiltration."</text:span></text:p>
        </text:list-item>
        <text:list-item>
          <text:p text:style-name="P32"><text:span text:style-name="T1">Phrase Variant D5:</text:span> "Overextension on the kingside! This aggressive pawn advance creates irreversible structural damage around the king, converting a safe shelter into a house of cards."</text:p>
        </text:list-item>
        <text:list-item>
          <text:p text:style-name="P31"><text:span text:style-name="T4">Phrase Variant D6:</text:span><text:span text:style-name="T3"> "A passive concession. This move gives up the active center for a defensive posture, condemning </text:span><text:span text:style-name="Source_20_Text"><text:span text:style-name="T3">[Player]</text:span></text:span><text:span text:style-name="T3"> to a long, grueling defense."</text:span></text:p>
        </text:list-item>
        <text:list-item>
          <text:p text:style-name="P31"><text:soft-page-break/><text:span text:style-name="T4">Phrase Variant D7:</text:span><text:span text:style-name="T3"> "This is a classic 'bad bishop' scenario. </text:span><text:span text:style-name="Source_20_Text"><text:span text:style-name="T3">[Player]</text:span></text:span><text:span text:style-name="T3"> places another pawn on the same color as their own bishop, reducing that piece to a glorified, expensive pawn."</text:span></text:p>
        </text:list-item>
        <text:list-item>
          <text:p text:style-name="P31"><text:span text:style-name="T4">Phrase Variant D8:</text:span><text:span text:style-name="T3"> "Allowing the opponent to double the pawns on the </text:span><text:span text:style-name="Source_20_Text"><text:span text:style-name="T3">[File]</text:span></text:span><text:span text:style-name="T3"> file is positionally irresponsible. The endgame prospects just took a massive dive."</text:span></text:p>
        </text:list-item>
        <text:list-item>
          <text:p text:style-name="P31"><text:span text:style-name="T4">Phrase Variant D9:</text:span><text:span text:style-name="T3"> "A superficial attack that leaves the structural foundation crumbling. </text:span><text:span text:style-name="Source_20_Text"><text:span text:style-name="T3">[Player]</text:span></text:span><text:span text:style-name="T3"> is focusing on immediate checks while losing the war of pawn majorities."</text:span></text:p>
        </text:list-item>
        <text:list-item>
          <text:p text:style-name="P32"><text:span text:style-name="T1">Phrase Variant D10:</text:span> "A lapse in tactical prophylaxis. The choice to abandon the central blockade allows the opponent's pawns to become a mobile, destructive avalanche."</text:p>
        </text:list-item>
      </text:list>
      <text:h text:style-name="P6" text:outline-level="3">Matrix C: Tactical Calculations, Blunders, &amp; Material Swings</text:h>
      <text:p text:style-name="P4">This matrix handles heavy calculation zones where $\Delta Cp$ drops or spikes dramatically. GM Chankya’s tone here is sharp, direct, and analytical.</text:p>
      <text:h text:style-name="P17" text:outline-level="4">1. Major Blunders (<text:span text:style-name="T3">$\Delta Cp \le -300$</text:span>)</text:h>
      <text:list text:style-name="L15">
        <text:list-item>
          <text:p text:style-name="P33"><text:span text:style-name="T4">Phrase Variant E1:</text:span><text:span text:style-name="T3"> "An absolute tactical catastrophe on </text:span><text:span text:style-name="Source_20_Text"><text:span text:style-name="T3">[Square]</text:span></text:span><text:span text:style-name="T3">. </text:span><text:span text:style-name="Source_20_Text"><text:span text:style-name="T3">[Player]</text:span></text:span><text:span text:style-name="T3"> completely misses a rudimentary tactical sequence, dropping whole material for zero compensation. Game over at this level."</text:span></text:p>
        </text:list-item>
        <text:list-item>
          <text:p text:style-name="P33"><text:span text:style-name="T4">Phrase Variant E2:</text:span><text:span text:style-name="T3"> "Total blindness. </text:span><text:span text:style-name="Source_20_Text"><text:span text:style-name="T3">[Move]</text:span></text:span><text:span text:style-name="T3"> walks directly into a devastating </text:span><text:span text:style-name="Source_20_Text"><text:span text:style-name="T3">[TacticalMotif]</text:span></text:span><text:span text:style-name="T3"> that was entirely predictable. A shocking lapse in concentration that destroys hours of hard work."</text:span></text:p>
        </text:list-item>
        <text:list-item>
          <text:p text:style-name="P33"><text:span text:style-name="T4">Phrase Variant E3:</text:span><text:span text:style-name="T3"> "A catastrophic hallucination. </text:span><text:span text:style-name="Source_20_Text"><text:span text:style-name="T3">[Player]</text:span></text:span><text:span text:style-name="T3"> believed this move was an attack, completely overlooked the simple defensive response that leaves them down an entire piece."</text:span></text:p>
        </text:list-item>
        <text:list-item>
          <text:p text:style-name="P33"><text:span text:style-name="T4">Phrase Variant E4:</text:span><text:span text:style-name="T3"> "This is a tactical disaster. The </text:span><text:span text:style-name="Source_20_Text"><text:span text:style-name="T3">[Piece]</text:span></text:span><text:span text:style-name="T3"> on </text:span><text:span text:style-name="Source_20_Text"><text:span text:style-name="T3">[Square]</text:span></text:span><text:span text:style-name="T3"> is left completely unguarded—hanging like a ripe fruit for the opponent to pluck without hesitation."</text:span></text:p>
        </text:list-item>
        <text:list-item>
          <text:p text:style-name="P34"><text:span text:style-name="T1">Phrase Variant E5:</text:span> "An unimaginable blunder. At the GM academy, we call this 'playing chess with your eyes closed.' The immediate tactical punishment is severe."</text:p>
        </text:list-item>
        <text:list-item>
          <text:p text:style-name="P33"><text:span text:style-name="T4">Phrase Variant E6:</text:span><text:span text:style-name="T3"> "A complete collapse of board vision. </text:span><text:span text:style-name="Source_20_Text"><text:span text:style-name="T3">[Player]</text:span></text:span><text:span text:style-name="T3"> steps into a forced mate sequence that Stockfish spots in less than a millisecond."</text:span></text:p>
        </text:list-item>
        <text:list-item>
          <text:p text:style-name="P34"><text:span text:style-name="T1">Phrase Variant E7:</text:span> "A fatal tactical oversight. This move unprotects the back rank, leaving the king vulnerable to a swift, embarrassing execution."</text:p>
        </text:list-item>
        <text:list-item>
          <text:p text:style-name="P33"><text:span text:style-name="T4">Phrase Variant E8:</text:span><text:span text:style-name="T3"> "Disastrous calculation. </text:span><text:span text:style-name="Source_20_Text"><text:span text:style-name="T3">[Player]</text:span></text:span><text:span text:style-name="T3"> initiated a complex trade sequence on </text:span><text:span text:style-name="Source_20_Text"><text:span text:style-name="T3">[Square]</text:span></text:span><text:span text:style-name="T3"> without counting the number of defenders accurately. A basic arithmetic failure."</text:span></text:p>
        </text:list-item>
        <text:list-item>
          <text:p text:style-name="P34"><text:span text:style-name="T1">Phrase Variant E9:</text:span> "The position collapses instantly. This desperate move does nothing to address the core threat, allowing a devastating fork that ends all resistance."</text:p>
        </text:list-item>
        <text:list-item>
          <text:p text:style-name="P33"><text:soft-page-break/><text:span text:style-name="T4">Phrase Variant E10:</text:span><text:span text:style-name="T3"> "A psychological breakdown. Facing minor pressure, </text:span><text:span text:style-name="Source_20_Text"><text:span text:style-name="T3">[Player]</text:span></text:span><text:span text:style-name="T3"> completely gives away the queen, abandoning all strategic sanity."</text:span></text:p>
        </text:list-item>
      </text:list>
      <text:h text:style-name="P17" text:outline-level="4">2. Brilliant/Surgical Tactical Strikes (<text:span text:style-name="T3">$\Delta Cp \ge +150$</text:span>)</text:h>
      <text:list text:style-name="L16">
        <text:list-item>
          <text:p text:style-name="P35"><text:span text:style-name="T4">Phrase Variant F1:</text:span><text:span text:style-name="T3"> "Sensational! A move of profound tactical beauty. </text:span><text:span text:style-name="Source_20_Text"><text:span text:style-name="T3">[Player]</text:span></text:span><text:span text:style-name="T3"> uncorks a spectacular sacrifice on </text:span><text:span text:style-name="Source_20_Text"><text:span text:style-name="T3">[Square]</text:span></text:span><text:span text:style-name="T3"> that shatters the opponent's defensive shell into pieces."</text:span></text:p>
        </text:list-item>
        <text:list-item>
          <text:p text:style-name="P36"><text:span text:style-name="T1">Phrase Variant F2:</text:span> "Surgical violence of the highest order. This stunning move exploits a hidden geometry on the board, forcing an immediate, decisive material gain."</text:p>
        </text:list-item>
        <text:list-item>
          <text:p text:style-name="P35"><text:span text:style-name="T4">Phrase Variant F3:</text:span><text:span text:style-name="T3"> "Deep computer-like calculation. </text:span><text:span text:style-name="Source_20_Text"><text:span text:style-name="T3">[Player]</text:span></text:span><text:span text:style-name="T3"> realized that the apparent loss of material is actually a deep trap, leading to a forced win of the game."</text:span></text:p>
        </text:list-item>
        <text:list-item>
          <text:p text:style-name="P36"><text:span text:style-name="T1">Phrase Variant F4:</text:span> "An absolutely sparkling tactical execution. It completely scrambles the opponent's defensive communication, exposing the king to a crossfire."</text:p>
        </text:list-item>
        <text:list-item>
          <text:p text:style-name="P35"><text:span text:style-name="T4">Phrase Variant F5:</text:span><text:span text:style-name="T3"> "A breathtaking intermediate move (Zwischenzug)! Instead of recapturing immediately, </text:span><text:span text:style-name="Source_20_Text"><text:span text:style-name="T3">[Player]</text:span></text:span><text:span text:style-name="T3"> inserts this deadly check, throwing the opponent's calculations into chaos."</text:span></text:p>
        </text:list-item>
        <text:list-item>
          <text:p text:style-name="P36"><text:span text:style-name="T1">Phrase Variant F6:</text:span> "Pure artistry on the board. This quiet, non-checking move is the most lethal stroke of all—leaving the opponent completely paralyzed against multiple tactical threats."</text:p>
        </text:list-item>
        <text:list-item>
          <text:p text:style-name="P35"><text:span text:style-name="T4">Phrase Variant F7:</text:span><text:span text:style-name="T3"> "An astonishing clearance sacrifice. By sacrificing the pawn on </text:span><text:span text:style-name="Source_20_Text"><text:span text:style-name="T3">[Square]</text:span></text:span><text:span text:style-name="T3">, </text:span><text:span text:style-name="Source_20_Text"><text:span text:style-name="T3">[Player]</text:span></text:span><text:span text:style-name="T3"> clears a high-speed highway for the rook to deliver the finishing blow."</text:span></text:p>
        </text:list-item>
        <text:list-item>
          <text:p text:style-name="P35"><text:span text:style-name="T4">Phrase Variant F8:</text:span><text:span text:style-name="T3"> "A tactical masterpiece. </text:span><text:span text:style-name="Source_20_Text"><text:span text:style-name="T3">[Player]</text:span></text:span><text:span text:style-name="T3"> masterfully orchestrates a double attack that leaves two major enemy pieces hanging simultaneously."</text:span></text:p>
        </text:list-item>
        <text:list-item>
          <text:p text:style-name="P35"><text:span text:style-name="T4">Phrase Variant F9:</text:span><text:span text:style-name="T3"> "Brilliant tactical alertness! </text:span><text:span text:style-name="Source_20_Text"><text:span text:style-name="T3">[Player]</text:span></text:span><text:span text:style-name="T3"> spots a subtle alignment defect in the opponent's camp and punishes it with an unstoppable skewer."</text:span></text:p>
        </text:list-item>
        <text:list-item>
          <text:p text:style-name="P35"><text:span text:style-name="T4">Phrase Variant F10:</text:span><text:span text:style-name="T3"> "A profound tactical liquidation. </text:span><text:span text:style-name="Source_20_Text"><text:span text:style-name="T3">[Player]</text:span></text:span><text:span text:style-name="T3"> spots a sequence that simplifies a complicated middlegame into a technically trivial, winning endgame."</text:span></text:p>
        </text:list-item>
      </text:list>
      <text:h text:style-name="P24" text:outline-level="3"><text:span text:style-name="T6">Matrix D: The Endgame Conversion Matrix (</text:span><text:span text:style-name="Source_20_Text"><text:span text:style-name="T3">PHASE_ENDGAME</text:span></text:span><text:span text:style-name="T6">)</text:span></text:h>
      <text:p text:style-name="P4">Endgames are about precision, king activity, and pawn promotion velocity. GM Chankya demands absolute efficiency here.</text:p>
      <text:h text:style-name="P15" text:outline-level="4">1. Flawless Technical Conversion (King Activity, Passed Pawns)</text:h>
      <text:list text:style-name="L17">
        <text:list-item>
          <text:p text:style-name="P37"><text:span text:style-name="T4">Phrase Variant G1:</text:span><text:span text:style-name="T3"> "An impeccable display of endgame technique. </text:span><text:span text:style-name="Source_20_Text"><text:span text:style-name="T3">[Player]</text:span></text:span><text:span text:style-name="T3"> understands that in the endgame, the king is an attacking piece—activating it aggressively towards the center."</text:span></text:p>
        </text:list-item>
        <text:list-item>
          <text:p text:style-name="P37"><text:soft-page-break/><text:span text:style-name="T4">Phrase Variant G2:</text:span><text:span text:style-name="T3"> "The passed pawn on the </text:span><text:span text:style-name="Source_20_Text"><text:span text:style-name="T3">[File]</text:span></text:span><text:span text:style-name="T3"> file is transformed into an absolute monster. With every step it takes towards promotion, the opponent's defensive options shrink."</text:span></text:p>
        </text:list-item>
        <text:list-item>
          <text:p text:style-name="P37"><text:span text:style-name="T4">Phrase Variant G3:</text:span><text:span text:style-name="T3"> "A masterclass in the 'Principle of Two Weaknesses.' </text:span><text:span text:style-name="Source_20_Text"><text:span text:style-name="T3">[Player]</text:span></text:span><text:span text:style-name="T3"> systematically stretches the opponent's lone defensive pieces until they reach a breaking point."</text:span></text:p>
        </text:list-item>
        <text:list-item>
          <text:p text:style-name="P38"><text:span text:style-name="T1">Phrase Variant G4:</text:span> "Surgical endgame calculation. This precise king maneuver secures the opposition, forcing the enemy king to surrender its defensive duties."</text:p>
        </text:list-item>
        <text:list-item>
          <text:p text:style-name="P37"><text:span text:style-name="T4">Phrase Variant G5:</text:span><text:span text:style-name="T3"> "Beautifully clean simplification. By forcing a rook trade, </text:span><text:span text:style-name="Source_20_Text"><text:span text:style-name="T3">[Player]</text:span></text:span><text:span text:style-name="T3"> transitions into a pawn endgame that is mathematically won. No room for counterplay."</text:span></text:p>
        </text:list-item>
        <text:list-item>
          <text:p text:style-name="P37"><text:span text:style-name="T4">Phrase Variant G6:</text:span><text:span text:style-name="T3"> "Flawless truncation of options. </text:span><text:span text:style-name="Source_20_Text"><text:span text:style-name="T3">[Player]</text:span></text:span><text:span text:style-name="T3"> uses their extra material to create a textbook dynamic barrier, cutting off the enemy king from the action."</text:span></text:p>
        </text:list-item>
        <text:list-item>
          <text:p text:style-name="P37"><text:span text:style-name="T4">Phrase Variant G7:</text:span><text:span text:style-name="T3"> "The ultimate triumph of patience. </text:span><text:span text:style-name="Source_20_Text"><text:span text:style-name="T3">[Player]</text:span></text:span><text:span text:style-name="T3"> slowly suffocates the remaining active enemy pieces, converting a tiny positional edge into a full point."</text:span></text:p>
        </text:list-item>
        <text:list-item>
          <text:p text:style-name="P37"><text:span text:style-name="T4">Phrase Variant G8:</text:span><text:span text:style-name="T3"> "Excellent execution of the Lucena Position mechanics. </text:span><text:span text:style-name="Source_20_Text"><text:span text:style-name="T3">[Player]</text:span></text:span><text:span text:style-name="T3"> begins building a protective bridge with the rook to shepherd the pawn across the finish line safely."</text:span></text:p>
        </text:list-item>
        <text:list-item>
          <text:p text:style-name="P38"><text:span text:style-name="T1">Phrase Variant G9:</text:span> "Highly sophisticated square calculation. This quiet king step completely neutralizes the opponent's desperate perpetual check attempts."</text:p>
        </text:list-item>
        <text:list-item>
          <text:p text:style-name="P38"><text:span text:style-name="T1">Phrase Variant G10:</text:span> "A textbook demonstration of outside passed pawn geometry. The pawn acts as a decoy, dragging the enemy king away to open up the entire opposite flank for pillaging."</text:p>
        </text:list-item>
      </text:list>
      <text:h text:style-name="P15" text:outline-level="4">2. Endgame Blunders (Passive King, Allowing Counterplay, Wrong Pawn Push)</text:h>
      <text:list text:style-name="L18">
        <text:list-item>
          <text:p text:style-name="P39"><text:span text:style-name="T1">Phrase Variant H1:</text:span> "A horrific technical blunder. Leaving the king hidden in the corner during a minor piece endgame is positional heresy. The king must fight!"</text:p>
        </text:list-item>
        <text:list-item>
          <text:p text:style-name="P39"><text:span text:style-name="T1">Phrase Variant H2:</text:span> "An unpardonable lapse in basic endgame knowledge. This premature pawn push allows the opponent to establish a permanent blockade, turning a clean win into a dead draw."</text:p>
        </text:list-item>
        <text:list-item>
          <text:p text:style-name="P40"><text:span text:style-name="T4">Phrase Variant H3:</text:span><text:span text:style-name="T3"> "Tragic carelessness. </text:span><text:span text:style-name="Source_20_Text"><text:span text:style-name="T3">[Player]</text:span></text:span><text:span text:style-name="T3"> had a trivial technical conversion but allowed the opponent’s remaining active rook to infiltrate the second rank and create chaos."</text:span></text:p>
        </text:list-item>
        <text:list-item>
          <text:p text:style-name="P40"><text:span text:style-name="T4">Phrase Variant H4:</text:span><text:span text:style-name="T3"> "A basic calculation error regarding pawn square geometry. </text:span><text:span text:style-name="Source_20_Text"><text:span text:style-name="T3">[Player]</text:span></text:span><text:span text:style-name="T3"> failed to count the squares accurately; the enemy king easily steps into the square of the pawn and kills it."</text:span></text:p>
        </text:list-item>
        <text:list-item>
          <text:p text:style-name="P40"><text:span text:style-name="T4">Phrase Variant H5:</text:span><text:span text:style-name="T3"> "An unforced tactical giveaway in the endgame. By dropping a critical pawn on the kingside, </text:span><text:span text:style-name="Source_20_Text"><text:span text:style-name="T3">[Player]</text:span></text:span><text:span text:style-name="T3"> gives the opponent a brand-new lease on life."</text:span></text:p>
        </text:list-item>
        <text:list-item>
          <text:p text:style-name="P39"><text:soft-page-break/><text:span text:style-name="T1">Phrase Variant H6:</text:span> "Completely misjudging the king's path. This roundabout journey allows the opponent's passed pawn to gain critical tempos and march to a queen."</text:p>
        </text:list-item>
        <text:list-item>
          <text:p text:style-name="P39"><text:span text:style-name="T1">Phrase Variant H7:</text:span> "Passive defensive mindset. GM Chankya always insists: rook endgames must be played with active activity. This passive defense is slow institutional suicide."</text:p>
        </text:list-item>
        <text:list-item>
          <text:p text:style-name="P40"><text:span text:style-name="T4">Phrase Variant H8:</text:span><text:span text:style-name="T3"> "A shocking failure to spot a basic stalemate defense. </text:span><text:span text:style-name="Source_20_Text"><text:span text:style-name="T3">[Player]</text:span></text:span><text:span text:style-name="T3"> rushed the conversion and walked straight into a classic, tragic draw trap."</text:span></text:p>
        </text:list-item>
        <text:list-item>
          <text:p text:style-name="P40"><text:span text:style-name="T4">Phrase Variant H9:</text:span><text:span text:style-name="T3"> "Allowing the enemy king to achieve opposition is a massive failure of technical execution. The win has slipped directly through </text:span><text:span text:style-name="Source_20_Text"><text:span text:style-name="T3">[Player]</text:span></text:span><text:span text:style-name="T3">'s fingers."</text:span></text:p>
        </text:list-item>
        <text:list-item>
          <text:p text:style-name="P40"><text:span text:style-name="T4">Phrase Variant H10:</text:span><text:span text:style-name="T3"> "This is why players must study their basic endgame theoretical endgames. </text:span><text:span text:style-name="Source_20_Text"><text:span text:style-name="T3">[Player]</text:span></text:span><text:span text:style-name="T3"> completely mismanages the queen vs. pawn structure, ruining a hard-fought game."</text:span></text:p>
        </text:list-item>
      </text:list>
      <text:h text:style-name="P3" text:outline-level="2">6. Combinatorial Assembly &amp; Contextual Narrative Smoothing</text:h>
      <text:p text:style-name="P4">The heart of a non-AI template system is the <text:span text:style-name="T1">Synthesis Algorithm</text:span>. If the engine merely outputs five sentences for five moves in a row, the report will read like a disjointed list of observations rather than a fluid lecture by GM Chankya.</text:p>
      <text:p text:style-name="P4">To bridge this gap, the engine uses <text:span text:style-name="T1">Transition Anchors</text:span> based on <text:span text:style-name="T1">Move Interception States</text:span>.</text:p>
      <text:h text:style-name="P6" text:outline-level="3">1. Narrative Continuity Logic (The Connection Layer)</text:h>
      <text:p text:style-name="P8"><text:span text:style-name="T3">The engine stores a secondary variable called </text:span><text:span text:style-name="Source_20_Text"><text:span text:style-name="T3">Last_Move_State</text:span></text:span><text:span text:style-name="T3">. When generating the sentence for the </text:span><text:span text:style-name="T5">current</text:span><text:span text:style-name="T3"> move, it evaluates the relationship between the previous move and the current move.</text:span></text:p>
      <text:h text:style-name="P15" text:outline-level="4">Scenario A: The Compounded Blunder (Previous Move = Error, Current Move = Error)</text:h>
      <text:list text:style-name="L19">
        <text:list-item>
          <text:p text:style-name="P41"><text:span text:style-name="T5">Logic:</text:span><text:span text:style-name="T3"> Do not pull a standard error phrase. Pull from the </text:span><text:span text:style-name="Source_20_Text"><text:span text:style-name="T3">REINFORCED_ERROR</text:span></text:span><text:span text:style-name="T3"> bucket.</text:span></text:p>
        </text:list-item>
        <text:list-item>
          <text:p text:style-name="P41"><text:span text:style-name="T5">Output:</text:span><text:span text:style-name="T3"> "Unbelievable! Instead of realizing the danger pointed out on the last move, </text:span><text:span text:style-name="Source_20_Text"><text:span text:style-name="T3">[Player]</text:span></text:span><text:span text:style-name="T3"> doubles down on bad calculations with </text:span><text:span text:style-name="Source_20_Text"><text:span text:style-name="T3">[Move]</text:span></text:span><text:span text:style-name="T3">. This isn't just an error; it's a structural collapse."</text:span></text:p>
        </text:list-item>
      </text:list>
      <text:h text:style-name="P15" text:outline-level="4">Scenario B: The Tactical Refutation (Previous Move = Error, Current Move = Brilliant)</text:h>
      <text:list text:style-name="L20">
        <text:list-item>
          <text:p text:style-name="P42"><text:span text:style-name="T2">Logic:</text:span> Connect the two moves as a cause-and-effect sequence.</text:p>
        </text:list-item>
        <text:list-item>
          <text:p text:style-name="P43"><text:span text:style-name="T5">Output:</text:span><text:span text:style-name="T3"> "And there is the swift punishment GM Chankya warned you about. </text:span><text:span text:style-name="Source_20_Text"><text:span text:style-name="T3">[Player2]</text:span></text:span><text:span text:style-name="T3"> instantly spots the structural opening left on the previous move and delivers a crushing tactical blow with </text:span><text:span text:style-name="Source_20_Text"><text:span text:style-name="T3">[Move]</text:span></text:span><text:span text:style-name="T3">."</text:span></text:p>
        </text:list-item>
      </text:list>
      <text:h text:style-name="P15" text:outline-level="4"><text:soft-page-break/>Scenario C: Steady Improvement (Previous Move = Balanced, Current Move = Excellent)</text:h>
      <text:list text:style-name="L21">
        <text:list-item>
          <text:p text:style-name="P44"><text:span text:style-name="T2">Logic:</text:span> Create a sense of building momentum.</text:p>
        </text:list-item>
        <text:list-item>
          <text:p text:style-name="P45"><text:span text:style-name="T5">Output:</text:span><text:span text:style-name="T3"> "Building beautifully upon the solid development of the previous phase, </text:span><text:span text:style-name="Source_20_Text"><text:span text:style-name="T3">[Player]</text:span></text:span><text:span text:style-name="T3"> pushes the advantage further with </text:span><text:span text:style-name="Source_20_Text"><text:span text:style-name="T3">[Move]</text:span></text:span><text:span text:style-name="T3">. The pressure is mounting."</text:span></text:p>
        </text:list-item>
      </text:list>
      <text:h text:style-name="P6" text:outline-level="3">2. Syntactic Parameter Replacement Table</text:h>
      <text:p text:style-name="P4">Before printing a sentence to the final report, a string replacement engine swaps technical tokens with precise descriptive terminology derived from PGN parsing:</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8"><text:span text:style-name="Strong_20_Emphasis"><text:span text:style-name="T3">Token Identifier</text:span></text:span></text:p>
            </table:table-cell>
            <table:table-cell table:style-name="Table2.A1" office:value-type="string">
              <text:p text:style-name="P18"><text:span text:style-name="Strong_20_Emphasis"><text:span text:style-name="T3">Engine Replacement Computation</text:span></text:span></text:p>
            </table:table-cell>
            <table:table-cell table:style-name="Table2.A1" office:value-type="string">
              <text:p text:style-name="P18"><text:span text:style-name="Strong_20_Emphasis"><text:span text:style-name="T3">Output Example</text:span></text:span></text:p>
            </table:table-cell>
          </table:table-row>
        </table:table-header-rows>
        <table:table-row>
          <table:table-cell table:style-name="Table2.A1" office:value-type="string">
            <text:p text:style-name="P20"><text:span text:style-name="Source_20_Text"><text:span text:style-name="T3">[Player]</text:span></text:span></text:p>
          </table:table-cell>
          <table:table-cell table:style-name="Table2.A1" office:value-type="string">
            <text:p text:style-name="P19">Extracts the profile name of the current active side</text:p>
          </table:table-cell>
          <table:table-cell table:style-name="Table2.A1" office:value-type="string">
            <text:p text:style-name="P19">"White" / "dsmuk"</text:p>
          </table:table-cell>
        </table:table-row>
        <table:table-row>
          <table:table-cell table:style-name="Table2.A1" office:value-type="string">
            <text:p text:style-name="P20"><text:span text:style-name="Source_20_Text"><text:span text:style-name="T3">[Move]</text:span></text:span></text:p>
          </table:table-cell>
          <table:table-cell table:style-name="Table2.A1" office:value-type="string">
            <text:p text:style-name="P19">Standard algebraic notation of the current move</text:p>
          </table:table-cell>
          <table:table-cell table:style-name="Table2.A1" office:value-type="string">
            <text:p text:style-name="P19">"Nxf7+"</text:p>
          </table:table-cell>
        </table:table-row>
        <table:table-row>
          <table:table-cell table:style-name="Table2.A1" office:value-type="string">
            <text:p text:style-name="P20"><text:span text:style-name="Source_20_Text"><text:span text:style-name="T3">[Square]</text:span></text:span></text:p>
          </table:table-cell>
          <table:table-cell table:style-name="Table2.A1" office:value-type="string">
            <text:p text:style-name="P19">The destination coordinate of the moving piece</text:p>
          </table:table-cell>
          <table:table-cell table:style-name="Table2.A1" office:value-type="string">
            <text:p text:style-name="P19">"e6"</text:p>
          </table:table-cell>
        </table:table-row>
        <table:table-row>
          <table:table-cell table:style-name="Table2.A1" office:value-type="string">
            <text:p text:style-name="P20"><text:span text:style-name="Source_20_Text"><text:span text:style-name="T3">[Piece]</text:span></text:span></text:p>
          </table:table-cell>
          <table:table-cell table:style-name="Table2.A1" office:value-type="string">
            <text:p text:style-name="P19">Map letter identifier to full human word</text:p>
          </table:table-cell>
          <table:table-cell table:style-name="Table2.A1" office:value-type="string">
            <text:p text:style-name="P19">"Knight" / "Dark-squared Bishop"</text:p>
          </table:table-cell>
        </table:table-row>
        <table:table-row>
          <table:table-cell table:style-name="Table2.A1" office:value-type="string">
            <text:p text:style-name="P20"><text:span text:style-name="Source_20_Text"><text:span text:style-name="T3">[TacticalMotif]</text:span></text:span></text:p>
          </table:table-cell>
          <table:table-cell table:style-name="Table2.A1" office:value-type="string">
            <text:p text:style-name="P19">Isolated structural flag from Gate 3A</text:p>
          </table:table-cell>
          <table:table-cell table:style-name="Table2.A1" office:value-type="string">
            <text:p text:style-name="P19">"Back-Rank Checkmate" / "Knight Fork"</text:p>
          </table:table-cell>
        </table:table-row>
        <table:table-row>
          <table:table-cell table:style-name="Table2.A1" office:value-type="string">
            <text:p text:style-name="P20"><text:span text:style-name="Source_20_Text"><text:span text:style-name="T3">[File]</text:span></text:span></text:p>
          </table:table-cell>
          <table:table-cell table:style-name="Table2.A1" office:value-type="string">
            <text:p text:style-name="P19">Map coordinate letter to descriptive name</text:p>
          </table:table-cell>
          <table:table-cell table:style-name="Table2.A1" office:value-type="string">
            <text:p text:style-name="P19">"Fully open c-file"</text:p>
          </table:table-cell>
        </table:table-row>
      </table:table>
      <text:h text:style-name="P6" text:outline-level="3">3. Dynamic Narrative Flow (Example Session)</text:h>
      <text:p text:style-name="P4">Let us trace how the engine builds a multi-line paragraph for a short sequence of moves without generative AI.</text:p>
      <text:list text:style-name="L22">
        <text:list-item>
          <text:p text:style-name="P46">Move 12. e4-e5 (Evaluation drops from +0.20 to -1.80. White blunder.)</text:p>
          <text:list>
            <text:list-item>
              <text:p text:style-name="P47"><text:span text:style-name="T5">Vector:</text:span><text:span text:style-name="T3"> </text:span><text:span text:style-name="Source_20_Text"><text:span text:style-name="T3">Cp: -180</text:span></text:span><text:span text:style-name="T3">, </text:span><text:span text:style-name="Source_20_Text"><text:span text:style-name="T3">Delta: -200</text:span></text:span><text:span text:style-name="T3">, </text:span><text:span text:style-name="Source_20_Text"><text:span text:style-name="T3">Phase: Middlegame</text:span></text:span><text:span text:style-name="T3">, </text:span><text:span text:style-name="Source_20_Text"><text:span text:style-name="T3">Piece: Pawn</text:span></text:span><text:span text:style-name="T3">, </text:span><text:span text:style-name="Source_20_Text"><text:span text:style-name="T3">Tag: Overextension</text:span></text:span><text:span text:style-name="T3">.</text:span></text:p>
            </text:list-item>
            <text:list-item>
              <text:p text:style-name="P47"><text:span text:style-name="T5">Engine Choice:</text:span><text:span text:style-name="T3"> </text:span><text:span text:style-name="Source_20_Text"><text:span text:style-name="T3">M_BLUNDER_CATASTROPHE</text:span></text:span><text:span text:style-name="T3"> -&gt; Variant 5.</text:span></text:p>
            </text:list-item>
            <text:list-item>
              <text:p text:style-name="P48"><text:span text:style-name="T2">Raw String:</text:span> "Overextension on the center! This aggressive pawn advance creates irreversible structural damage, converting a safe shelter into a house of cards."</text:p>
            </text:list-item>
          </text:list>
        </text:list-item>
        <text:list-item>
          <text:p text:style-name="P46"><text:soft-page-break/>Move 12... d6xe5 (Evaluation moves from -1.80 to -1.90. Black plays best move.)</text:p>
          <text:list>
            <text:list-item>
              <text:p text:style-name="P47"><text:span text:style-name="T5">Vector:</text:span><text:span text:style-name="T3"> </text:span><text:span text:style-name="Source_20_Text"><text:span text:style-name="T3">Cp: -190</text:span></text:span><text:span text:style-name="T3">, </text:span><text:span text:style-name="Source_20_Text"><text:span text:style-name="T3">Delta: -10</text:span></text:span><text:span text:style-name="T3">, </text:span><text:span text:style-name="Source_20_Text"><text:span text:style-name="T3">Phase: Middlegame</text:span></text:span><text:span text:style-name="T3">, </text:span><text:span text:style-name="Source_20_Text"><text:span text:style-name="T3">Last_State: White_Blunder</text:span></text:span><text:span text:style-name="T3">.</text:span></text:p>
            </text:list-item>
            <text:list-item>
              <text:p text:style-name="P47"><text:span text:style-name="T5">Engine Choice:</text:span><text:span text:style-name="T3"> </text:span><text:span text:style-name="Source_20_Text"><text:span text:style-name="T3">Contextual Anchor: Tactical Refutation</text:span></text:span><text:span text:style-name="T3"> -&gt; Variant 2.</text:span></text:p>
            </text:list-item>
            <text:list-item>
              <text:p text:style-name="P47"><text:span text:style-name="T5">Raw String:</text:span><text:span text:style-name="T3"> "And there is the swift punishment GM Chankya warned you about. Black instantly spots the structural opening left on the previous move and accepts the central invitation via </text:span><text:span text:style-name="Source_20_Text"><text:span text:style-name="T3">d6xe5</text:span></text:span><text:span text:style-name="T3">."</text:span></text:p>
            </text:list-item>
          </text:list>
        </text:list-item>
      </text:list>
      <text:h text:style-name="P3" text:outline-level="2">7. Scale &amp; Architecture Optimization for 3,000+ Sentences</text:h>
      <text:p text:style-name="P4">Managing a library of 3,000 sentences requires an organized data structure. If you hardcode these phrases inside giant conditional chains, the application will become impossible to maintain, debug, or extend.</text:p>
      <text:p text:style-name="P4">The system relies on a clean separation between <text:span text:style-name="T1">Data Storage (JSON matrix)</text:span> and the <text:span text:style-name="T1">Execution Logic Layer (Rust / Flutter Core)</text:span>.</text:p>
      <text:h text:style-name="P6" text:outline-level="3">1. The Matrix Partition Blueprint (JSON Schema Definition)</text:h>
      <text:p text:style-name="P4">The entire phrase library is housed in structured files broken down by game phase. Below is the non-code data architecture layout for the phrase dictionary:</text:p>
      <text:p text:style-name="Text_20_body">{ "database_metadata": { "persona": "GM_Chankya", "total_matrix_count": 24, "target_sentence_capacity": 3000 }, "matrices": { "phase_middlegame": { "evaluation_gates": { "blunder_catastrophe": { "tactical_motifs": { "piece_pin": [ "A horrific oversight by [Player]. Moving the piece to [Square] walks straight into a lethal pin along the diagonal.", "GM Chankya shakes his head. This move paralyzes the [Piece] because of the pin created against the king behind it." ], "material_hanging": [ "Total board blindness. [Player] advances with [Move], completely failing to realize the [Piece] on [Square] is left entirely without defenders.", "A gift that should never be offered at this academy. [Move] simply drops material with zero compensation." ] } }, "maintain_balance": { "positional_features": { "center_dominance": [ "An astute, classic strategic adjustment. By solidifying the [Piece] in the center, [Player] restricts the opponent's counterplay.", "Steadily controlling the core squares. This move ensures that any tactical breaks by the opponent will be safely contained." ] } } } } } }</text:p>
      <text:h text:style-name="P9" text:outline-level="3">2. Eliminating Repetition with the Shuffling Ring-Buffer</text:h>
      <text:p text:style-name="P4">To guarantee absolute linguistic diversity, the logic layer runs a <text:span text:style-name="T1">Circular Shuffling Buffer</text:span> for each terminal category node:</text:p>
      <text:list text:style-name="L23">
        <text:list-item>
          <text:p text:style-name="P49"><text:span text:style-name="T3">When a specific path is hit (e.g., </text:span><text:span text:style-name="Source_20_Text"><text:span text:style-name="T3">Middlegame</text:span></text:span><text:span text:style-name="T3"> $\rightarrow$ </text:span><text:span text:style-name="Source_20_Text"><text:span text:style-name="T3">Blunder</text:span></text:span><text:span text:style-name="T3"> $\rightarrow$ </text:span><text:span text:style-name="Source_20_Text"><text:span text:style-name="T3">Piece Pin</text:span></text:span><text:span text:style-name="T3">), the engine looks at the array of 10 available phrases.</text:span></text:p>
        </text:list-item>
        <text:list-item>
          <text:p text:style-name="P50">Instead of a purely random pick (which can choose the same sentence twice in a row), the engine maintains a small historical log of the last 4 index numbers used for that specific node.</text:p>
        </text:list-item>
        <text:list-item>
          <text:p text:style-name="P50"><text:soft-page-break/>The engine filters out those recently used index numbers and selects randomly from the remaining valid items.</text:p>
        </text:list-item>
        <text:list-item>
          <text:p text:style-name="P50">Once a sentence is chosen, its index number is added to the log, and the oldest log entry is dropped. This mechanism ensures that the same phrase cannot reappear within a 4-move window under the exact same conditions.</text:p>
        </text:list-item>
      </text:list>
      <text:h text:style-name="P6" text:outline-level="3">3. Sentence Expansion Vector (Reaching the 3,000-Phrase Target)</text:h>
      <text:p text:style-name="P4">To smoothly build your library to the 3,000-sentence mark, expand the data structure across these specific granular categories:</text:p>
      <text:p text:style-name="P51"><text:span text:style-name="Source_20_Text"><text:s text:c="26"/></text:span><text:span text:style-name="Source_20_Text"><text:span text:style-name="T3">[ 3,000 SENTENCE MATRIX ]</text:span></text:span></text:p>
      <text:p text:style-name="P52"><text:span text:style-name="Source_20_Text"><text:s text:c="38"/>│</text:span></text:p>
      <text:p text:style-name="P52"><text:span text:style-name="Source_20_Text"><text:s text:c="9"/>┌────────────────────────────┼────────────────────────────┐</text:span></text:p>
      <text:p text:style-name="P52"><text:span text:style-name="Source_20_Text"><text:s text:c="9"/>▼ <text:s text:c="27"/>▼ <text:s text:c="27"/>▼</text:span></text:p>
      <text:p text:style-name="P52"><text:span text:style-name="Source_20_Text"><text:s text:c="3"/></text:span><text:span text:style-name="Source_20_Text"><text:span text:style-name="T3">[ GAME PHASES ] <text:s text:c="12"/>[ EVALUATION BUCKETS ] <text:s text:c="7"/>[ SPECIFIC TACTICAL TAGS ]</text:span></text:span></text:p>
      <text:p text:style-name="P52"><text:span text:style-name="Source_20_Text"><text:s text:c="3"/></text:span><text:span text:style-name="Source_20_Text"><text:span text:style-name="T3">- Opening (10 sub-tags) <text:s text:c="4"/>- Critical Mate (+/- M) <text:s text:c="6"/>- Knight Forks</text:span></text:span></text:p>
      <text:p text:style-name="P52"><text:span text:style-name="Source_20_Text"><text:s text:c="3"/></text:span><text:span text:style-name="Source_20_Text"><text:span text:style-name="T3">- Early Middlegame <text:s text:c="9"/>- Decisive Edge (+300) <text:s text:c="7"/>- Bishop Skewers</text:span></text:span></text:p>
      <text:p text:style-name="P52"><text:span text:style-name="Source_20_Text"><text:s text:c="3"/></text:span><text:span text:style-name="Source_20_Text"><text:span text:style-name="T3">- Closed Middlegame <text:s text:c="8"/>- Solid Advantage (+150) <text:s text:c="5"/>- Back-Rank Vulnerabilities</text:span></text:span></text:p>
      <text:p text:style-name="P52"><text:span text:style-name="Source_20_Text"><text:s text:c="3"/></text:span><text:span text:style-name="Source_20_Text"><text:span text:style-name="T3">- Open Middlegame <text:s text:c="10"/>- Minor Edge (+50) <text:s text:c="11"/>- En Passant Mechanics</text:span></text:span></text:p>
      <text:p text:style-name="P52"><text:span text:style-name="Source_20_Text"><text:s text:c="3"/></text:span><text:span text:style-name="Source_20_Text"><text:span text:style-name="T3">- Tactical Chaos <text:s text:c="11"/>- Absolute Equality (0) <text:s text:c="6"/>- Castling Disruption</text:span></text:span></text:p>
      <text:p text:style-name="P52"><text:span text:style-name="Source_20_Text"><text:s text:c="3"/></text:span><text:span text:style-name="Source_20_Text"><text:span text:style-name="T3">- Major Piece Endgame <text:s text:c="6"/>- Slight Disadvantage (-50) <text:s text:c="2"/>- Isolated Queen Pawns</text:span></text:span></text:p>
      <text:p text:style-name="P52"><text:span text:style-name="Source_20_Text"><text:s text:c="3"/></text:span><text:span text:style-name="Source_20_Text"><text:span text:style-name="T3">- Minor Piece Endgame <text:s text:c="6"/>- Clear Deficit (-150) <text:s text:c="7"/>- Backward Pawn Liabilities</text:span></text:span></text:p>
      <text:p text:style-name="P52"><text:span text:style-name="Source_20_Text"><text:s text:c="3"/></text:span><text:span text:style-name="Source_20_Text"><text:span text:style-name="T3">- Pawn-Only Conversions <text:s text:c="4"/>- Positional Ruin (-300) <text:s text:c="5"/>- Seventh Rank Infiltration</text:span></text:span></text:p>
      <text:p text:style-name="P4">Multiplying <text:span text:style-name="T1">8 Game Phases</text:span> $\times$ <text:span text:style-name="T1">9 Evaluation Buckets</text:span> $\times$ <text:span text:style-name="T1">5 Structural/Tactical Motif Tags</text:span> yields <text:span text:style-name="T1">360 unique structural states</text:span>. By providing <text:span text:style-name="T1">8 to 10 vocabulary variants</text:span> for each unique state, your library naturally scales to a robust collection of <text:span text:style-name="T1">3,240 highly distinct, context-aware sentences</text:span>.</text:p>
      <text:h text:style-name="P6" text:outline-level="3">4. Integration with Your Visual Systems</text:h>
      <text:p text:style-name="P4">Because this logic runs as a purely deterministic pipeline, it integrates into cross-platform desktop or mobile apps with ease. The engine acts as a fast data parser:</text:p>
      <text:list text:style-name="L24">
        <text:list-item>
          <text:p text:style-name="P53">The user loads a game.</text:p>
        </text:list-item>
        <text:list-item>
          <text:p text:style-name="P53">The application runs Stockfish on the background thread for each position to build the state vectors.</text:p>
        </text:list-item>
        <text:list-item>
          <text:p text:style-name="P53">The system pipes the vectors through the logic gates, queries the JSON dictionary, and prints a beautifully rendered, highly structured, human-sounding PDF or markdown analysis report.</text:p>
        </text:list-item>
      </text:list>
      <text:p text:style-name="P4">The entire process takes less than a second, carries zero operational cost, and offers students a reliable analytical report written in the exact instructional voice of <text:span text:style-name="T1">GM Chankya</text:span>.</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06T15:13:44.030238000</meta:creation-date>
    <dc:date>2026-06-06T15:15:59.487964000</dc:date>
    <meta:editing-duration>PT2M15S</meta:editing-duration>
    <meta:editing-cycles>1</meta:editing-cycles>
    <meta:document-statistic meta:table-count="2" meta:image-count="0" meta:object-count="0" meta:page-count="14" meta:paragraph-count="263" meta:word-count="4726" meta:character-count="31839" meta:non-whitespace-character-count="27220"/>
    <meta:generator>LibreOffice/26.2.3.2$Windows_X86_64 LibreOffice_project/70e089b17412e4cb7773e41413306b17a2328c34</meta:generator>
  </office:meta>
</office:document-meta>
</file>