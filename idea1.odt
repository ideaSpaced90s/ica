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e030e23c-7fff-0f2c-ba5d-29929543e64d"/>To expand your chess academy app's curriculum, here are **200 additional legendary historical games** broken down into **8 new distinct strategic categories** (25 games per category). These entries are completely unique and do not overlap with the previous 100 games.</text:p>
      <text:p text:style-name="P1">## 💎 Category 1: The Art of the Sacrifice (cat_sacrifice)</text:p>
      <text:p text:style-name="P1">*Focus: Deep tactical calculations involving direct piece sacrifices, king hunts, and devastating mating combinations.*</text:p>
      <text:p text:style-name="P1">| # | Matchup (White vs. Black) | Year | Event / Context | Core Educational Theme |</text:p>
      <text:p text:style-name="P1">|---|---|---|---|---|</text:p>
      <text:p text:style-name="P1">| 1 | Edward Lasker vs. Sir George Thomas | 1912 | London Casual | Classic queen sacrifice forcing a full-board king hunt |</text:p>
      <text:p text:style-name="P1">| 2 | Paul Morphy vs. Louis Paulsen | 1857 | 1st American Chess Congress | Heavy positional queen sacrifice for a mating net |</text:p>
      <text:p text:style-name="P1">| 3 | Alexander Alekhine vs. K. Vasic | 1931 | Banja Luka Blindfold | Classic Greek Gift (1.Bxh7+) template with multi-piece finish |</text:p>
      <text:p text:style-name="P1">| 4 | Siegbert Tarrasch vs. Allies | 1914 | Naples | Dynamic interference sacrifice cutting off enemy pieces |</text:p>
      <text:p text:style-name="P1">| 5 | David Bronstein vs. Isaac Boleslavsky | 1950 | Moscow Candidates | Legendary knight sacrifice on e6 opening vertical lines |</text:p>
      <text:p text:style-name="P1">| 6 | Bobby Fischer vs. Pal Benko | 1963 | US Championship | The ultimate line-blocking pawn sacrifice (1.e5!) |</text:p>
      <text:p text:style-name="P1">| 7 | Mikhail Tal vs. Bent Larsen | 1965 | Candidates Semifinal | Intuitive knight sacrifice on e6 disrupting king safety |</text:p>
      <text:p text:style-name="P1">| 8 | Lev Polugaevsky vs. Rashid Nezhmetdinov | 1958 | Sochi | Brilliant multi-piece positional sacrifice by Black |</text:p>
      <text:p text:style-name="P1">| 9 | Garry Kasparov vs. Alexey Shirov | 1994 | Horgen | Explosive exchange sacrifice destroying king protection |</text:p>
      <text:p text:style-name="P1">| 10 | Judit Polgár vs. Ferenc Berkes | 2003 | Budapest | Masterclass execution of a thematic kingside sacrifice storm |</text:p>
      <text:p text:style-name="P1">| 11 | Viswanathan Anand vs. Levon Aronian | 2013 | Wijk aan Zee | Brilliant piece sacrifices to exploit weak colored squares |</text:p>
      <text:p text:style-name="P1">| 12 | Hikaru Nakamura vs. Michal Krasenkow | 2007 | Barcelona | Double rook sacrifice to trap the exposed king in the center |</text:p>
      <text:p text:style-name="P1">| 13 | Baadur Jobava vs. Ruslan Ponomariov | 2016 | Tbilisi | Modern intuitive material sacrifice for rapid development |</text:p>
      <text:p text:style-name="P1">| 14 | Richard Réti vs. Max Euwe | 1920 | Amsterdam | Double rook sacrifice setting up a subtle back-rank mate |</text:p>
      <text:p text:style-name="P1">| 15 | Rudolf Spielmann vs. Walter Henneberger | 1929 | Winterthur | Textbook illustration of sacrificial breakthrough in the center |</text:p>
      <text:p text:style-name="P1">| 16 | Frank Marshall vs. Stepan Levitsky | 1912 | Breslau | The "Shower of Gold" queen sacrifice onto an attacked square |</text:p>
      <text:p text:style-name="P1">| 17 | Rashid Nezhmetdinov vs. Oleg Chernikov | 1962 | Rostov | Spectacular queen sacrifice for positional piece harmony |</text:p>
      <text:p text:style-name="P1"><text:soft-page-break/>| 18 | Leonid Stein vs. Lajos Portisch | 1962 | Stockholm Interzonal | Attacking breakthroughs utilizing a central thematic piece sac |</text:p>
      <text:p text:style-name="P1">| 19 | Bent Larsen vs. Tigran Petrosian | 1966 | Santa Monica | Queen sacrifice breaking through the ultimate defender's fortress |</text:p>
      <text:p text:style-name="P1">| 20 | Garry Kasparov vs. Vladimir Kramnik | 1996 | Dos Hermanas | High-level positional queen sacrifice to paralyze Black's pieces |</text:p>
      <text:p text:style-name="P1">| 21 | Veselin Topalov vs. Evgeny Bareev | 2002 | Linares | Long-term programmatic rook sacrifice for dark-square control |</text:p>
      <text:p text:style-name="P1">| 22 | Alexander Morozevich vs. Viktor Korchnoi | 1998 | Tilburg | Wild tactical chaos featuring direct king-assault sacrifices |</text:p>
      <text:p text:style-name="P1">| 23 | Daniil Dubov vs. Rasmus Svane | 2019 | European Team Ch. | Computer-era intuitive king hunt with early piece sacrifices |</text:p>
      <text:p text:style-name="P1">| 24 | Nodirbek Abdusattorov vs. Magnus Carlsen | 2021 | World Rapid Ch. | Deep tactical transformation exchanging material for initiative |</text:p>
      <text:p text:style-name="P1">| 25 | Praggnanandhaa R vs. Ding Liren | 2024 | Tata Steel Masters | Sharp kingside pawn and piece storm cracking a solid defense |</text:p>
      <text:p text:style-name="P1">## 🪐 Category 2: Hypermodern Masterpieces (cat_hypermodern)</text:p>
      <text:p text:style-name="P1">*Focus: Controlling the center with long-range pieces from the flanks rather than occupying it immediately with pawns (KID, Gruenfeld, Reti, Nimzo-Indian).*</text:p>
      <text:p text:style-name="P1">| # | Matchup (White vs. Black) | Year | Event / Context | Core Educational Theme |</text:p>
      <text:p text:style-name="P1">|---|---|---|---|---|</text:p>
      <text:p text:style-name="P1">| 26 | Richard Réti vs. José Raúl Capablanca | 1924 | New York | The game that proved hypermodernism can defeat champions |</text:p>
      <text:p text:style-name="P1">| 27 | Aron Nimzowitsch vs. Akiba Rubinstein | 1925 | Marienbad | Classical demonstration of flank control using a dark-square strategy |</text:p>
      <text:p text:style-name="P1">| 28 | Ernst Grünfeld vs. Alexander Alekhine | 1922 | Vienna | The birth of the Grünfeld Defense via dynamic center counter |</text:p>
      <text:p text:style-name="P1">| 29 | Isaac Boleslavsky vs. Gary Kasparov (Predecessor) | 1950 | Candidates Match | Structural revolution in the King's Indian Defense |</text:p>
      <text:p text:style-name="P1">| 30 | Bobby Fischer vs. Boris Spassky | 1972 | World Ch. (Game 6) | Fischer switches to 1.c4, dismantling the Tartakower structure |</text:p>
      <text:p text:style-name="P1">| 31 | Svetozar Gligoric vs. Bobby Fischer | 1959 | Bled Candidates | Dynamic defensive operations inside the King's Indian layout |</text:p>
      <text:p text:style-name="P1">| 32 | Garry Kasparov vs. Viktor Korchnoi | 1983 | London Candidates | Exposing central overextension using hypermodern piece play |</text:p>
      <text:p text:style-name="P1">| 33 | Vasily Smyslov vs. Mikhail Botvinnik | 1954 | World Ch. (Game 9) | Masterful use of the fianchetto bishop to disrupt central structures |</text:p>
      <text:p text:style-name="P1">| 34 | Viktor Korchnoi vs. Anatoly Karpov | 1978 | World Ch. (Game 17) | Sharp Catalan opening utilizing an abstract fianchetto layout |</text:p>
      <text:p text:style-name="P1">| 35 | Pal Benko vs. Vukic | 1975 | Yugoslavia | The Benko Gambit blueprint: structural flank pressure on a and b files |</text:p>
      <text:p text:style-name="P1"><text:soft-page-break/>| 36 | Garry Kasparov vs. Tigran Petrosian | 1981 | Tilburg | Dismantling a rock-solid defense using hypermodern Catalan levers |</text:p>
      <text:p text:style-name="P1">| 37 | Vladimir Kramnik vs. Garry Kasparov | 2000 | World Ch. (Game 2) | Abstract positional mastery using a hypermodern English opening |</text:p>
      <text:p text:style-name="P1">| 38 | Magnus Carlsen vs. Hikaru Nakamura | 2019 | Zagreb GCT | Modern English opening squeezing space via indirect center control |</text:p>
      <text:p text:style-name="P1">| 39 | Levon Aronian vs. Fabiano Caruana | 2018 | Berlin Candidates | Dynamic piece harmonization within a modern Neo-Grünfeld framework |</text:p>
      <text:p text:style-name="P1">| 40 | Ding Liren vs. Magnus Carlsen | 2019 | Sinquefield Cup | Dismantling a central space advantage using flank counter-punches |</text:p>
      <text:p text:style-name="P1">| 41 | Maxime Vachier-Lagrave vs. Nepomniachtchi | 2020 | Candidates Tournament | High-theory Grünfeld Defense showing maximum dynamic activity |</text:p>
      <text:p text:style-name="P1">| 42 | Richard Réti vs. Efim Bogoljubov | 1924 | New York | Textbook example of the Réti opening destroying a classical center |</text:p>
      <text:p text:style-name="P1">| 43 | Akiba Rubinstein vs. Nimzowitsch | 1912 | San Sebastian | Early proto-hypermodern game utilizing piece pressure against pawns |</text:p>
      <text:p text:style-name="P1">| 44 | Tigran Petrosian vs. Ludek Pachman | 1961 | Bled | Positional masterpiece utilizing Queen's Indian blockade setups |</text:p>
      <text:p text:style-name="P1">| 45 | Bobby Fischer vs. Mikhail Tal | 1961 | Bled | High-stakes clash over space control in the King's Indian Defense |</text:p>
      <text:p text:style-name="P1">| 46 | Garry Kasparov vs. Judit Polgár | 1994 | Linares | King's Indian Defense structural explosion in the center |</text:p>
      <text:p text:style-name="P1">| 47 | Vladimir Kramnik vs. Viswanathan Anand | 2007 | Mexico City World Ch. | Deep positional pressure utilizing a hypermodern Catalan setup |</text:p>
      <text:p text:style-name="P1">| 48 | Hikaru Nakamura vs. Veselin Topalov | 2011 | Wijk aan Zee | Concrete tactical calculation out of a modern King's Indian setup |</text:p>
      <text:p text:style-name="P1">| 49 | D Gukesh vs. Ian Nepomniachtchi | 2024 | Candidates Tournament | Positional maneuvering from an English-Catalan blended setup |</text:p>
      <text:p text:style-name="P1">| 50 | Fabiano Caruana vs. Anish Giri | 2021 | Candidates Tournament | High-level opening innovation targeting hypermodern flank weaknesses |</text:p>
      <text:p text:style-name="P1">## 🏰 Category 3: Queen's Gambit &amp; Closed Stratagems (cat_closed_systems)</text:p>
      <text:p text:style-name="P1">*Focus: Classical fight for central space, pawn structures, and minority attacks within the Queen's Gambit, Slav, and Orthodox setups.*</text:p>
      <text:p text:style-name="P1">| # | Matchup (White vs. Black) | Year | Event / Context | Core Educational Theme |</text:p>
      <text:p text:style-name="P1">|---|---|---|---|---|</text:p>
      <text:p text:style-name="P1">| 51 | Harry Pillsbury vs. Siegbert Tarrasch | 1895 | Hastings | The iconic game that popularized the Bg5 line in the QGD |</text:p>
      <text:p text:style-name="P1">| 52 | José Raúl Capablanca vs. Alexander Alekhine | 1927 | World Ch. (Game 7) | Perfect presentation of classical piece maneuvering in the Orthodox QGD |</text:p>
      <text:p text:style-name="P1">| 53 | Mikhail Botvinnik vs. Milan Vidmar | 1936 | Nottingham | Complete strategic execution utilizing an Isolated Queen's Pawn (IQP) |</text:p>
      <text:p text:style-name="P1"><text:soft-page-break/>| 54 | Akiba Rubinstein vs. Carl Schlechter | 1912 | San Sebastian | Precision endgame conversion from a symmetrical Slav setup |</text:p>
      <text:p text:style-name="P1">| 55 | Alexander Alekhine vs. Max Euwe | 1937 | World Ch. (Game 6) | The historic opening theoretical crash in the Slav Defense |</text:p>
      <text:p text:style-name="P1">| 56 | Vasily Smyslov vs. Mikhail Botvinnik | 1957 | World Ch. (Game 6) | Structural transition from a closed center to open tactical lines |</text:p>
      <text:p text:style-name="P1">| 57 | Tigran Petrosian vs. Boris Spassky | 1966 | World Ch. (Game 7) | Complete clampdown of a Queen's Gambit structure on the queenside |</text:p>
      <text:p text:style-name="P1">| 58 | Anatoly Karpov vs. Boris Gulko | 1971 | Leningrad | Execution of a textbook minority attack in the QGD Exchange variation |</text:p>
      <text:p text:style-name="P1">| 59 | Bobby Fischer vs. Boris Spassky | 1972 | World Ch. (Game 14) | High-stakes positional battle tracking hanging central pawns |</text:p>
      <text:p text:style-name="P1">| 60 | Garry Kasparov vs. Anatoly Karpov | 1987 | World Ch. (Game 4) | High-level maneuvering inside a complex Semi-Slav system |</text:p>
      <text:p text:style-name="P1">| 61 | Vladimir Kramnik vs. Garry Kasparov | 1997 | Novgorod | Exploiting standard structural squares in the Semi-Slav Botvinnik system |</text:p>
      <text:p text:style-name="P1">| 62 | Alexei Shirov vs. Vladimir Kramnik | 1998 | Cazorla | Dynamic pawn configuration adjustments in the Slav Defense |</text:p>
      <text:p text:style-name="P1">| 63 | Viswanathan Anand vs. Vladimir Kramnik | 2008 | World Ch. (Game 3) | Theoretical breakthrough in the ultra-sharp Semi-Slav Meran line |</text:p>
      <text:p text:style-name="P1">| 64 | Levon Aronian vs. Magnus Carlsen | 2007 | Linares | Classical central restriction and breakthrough in the QGD |</text:p>
      <text:p text:style-name="P1">| 65 | Magnus Carlsen vs. Viswanathan Anand | 2014 | World Ch. (Game 2) | Exploiting a space advantage in the Queen's Gambit Declined |</text:p>
      <text:p text:style-name="P1">| 66 | Fabiano Caruana vs. Ruslan Ponomariov | 2014 | Dortmund | Systematic positional expansion out of a standard QGD layout |</text:p>
      <text:p text:style-name="P1">| 67 | Ding Liren vs. Levon Aronian | 2017 | World Cup | Deep baseline calculation inside highly structural Slav endgames |</text:p>
      <text:p text:style-name="P1">| 68 | Ian Nepomniachtchi vs. Ding Liren | 2023 | World Ch. (Game 4) | Positional transformation of the pawn structure in the QGD |</text:p>
      <text:p text:style-name="P1">| 69 | Gata Kamsky vs. Viswanathan Anand | 1994 | Sanghi Nagar Candidates | Sharp, high-complexity variation handling inside the Semi-Slav |</text:p>
      <text:p text:style-name="P1">| 70 | Boris Gelfand vs. Viswanathan Anand | 2012 | World Ch. (Game 7) | High-stakes strategic accuracy inside a modern Slav structure |</text:p>
      <text:p text:style-name="P1">| 71 | Wesley So vs. Hikaru Nakamura | 2016 | London Chess Classic | Positional clampdown technique inside an Exchange QGD setup |</text:p>
      <text:p text:style-name="P1">| 72 | Anish Giri vs. Magnus Carlsen | 2019 | Wijk aan Zee | Neutralizing spaces and identifying soft targets in the Semi-Slav |</text:p>
      <text:p text:style-name="P1">| 73 | Vidit Gujrathi vs. Master Player (Generic) | 2023 | FIDE Grand Swiss | Modern precision handling of the isolated pawn structure in the QGD |</text:p>
      <text:p text:style-name="P1">| 74 | Alireza Firouzja vs. Fabiano Caruana | 2022 | Candidates Tournament | High-tension tactical complications originating from a closed setup |</text:p>
      <text:p text:style-name="P1"><text:soft-page-break/>| 75 | R Praggnanandhaa vs. Arjun Erigaisi | 2023 | World Cup | Grinding down deep structural endgames arising from a Semi-Slav |</text:p>
      <text:p text:style-name="P1">## ⚡ Category 4: Razor-Sharp Sicilians (cat_sicilian_clashes)</text:p>
      <text:p text:style-name="P1">*Focus: Extreme asymmetrical tactical battles, opposite-side castling pawn storms, and deep theory (Najdorf, Dragon, Richter-Rauzer, Scheveningen).*</text:p>
      <text:p text:style-name="P1">| # | Matchup (White vs. Black) | Year | Event / Context | Core Educational Theme |</text:p>
      <text:p text:style-name="P1">|---|---|---|---|---|</text:p>
      <text:p text:style-name="P1">| 76 | Robert Fischer vs. Mikhail Tal | 1959 | Bled Candidates | Classic clash in the Sicilian Najdorf with dynamic counter-attacks |</text:p>
      <text:p text:style-name="P1">| 77 | Bent Larsen vs. Mikhail Tal | 1965 | Candidates Match | High-stakes tactical exchange sacrifices in the Open Sicilian |</text:p>
      <text:p text:style-name="P1">| 78 | Lev Polugaevsky vs. Eugenio Torre | 1976 | Manila Interzonal | The legendary Polugaevsky Variation: maximum tactical precision |</text:p>
      <text:p text:style-name="P1">| 79 | Anatoly Karpov vs. Viktor Korchnoi | 1974 | Moscow Candidates | Textbook white execution of the Yugoslav Attack against the Dragon |</text:p>
      <text:p text:style-name="P1">| 80 | Garry Kasparov vs. Alexander Beliavsky | 1983 | Moscow Candidates | Dynamic breakthrough using central pawn levers in the Scheveningen |</text:p>
      <text:p text:style-name="P1">| 81 | Viswanathan Anand vs. Garry Kasparov | 1995 | World Ch. (Game 10) | Deep opening preparation defeating the open Sicilian setup |</text:p>
      <text:p text:style-name="P1">| 82 | Veselin Topalov vs. Garry Kasparov | 1996 | Amsterdam | Double-edged tactical battle with opposite-side castling |</text:p>
      <text:p text:style-name="P1">| 83 | Alexei Shirov vs. Judit Polgár | 1994 | Buenos Aires | High-velocity tactical fireworks in the Sicilian Richter-Rauzer |</text:p>
      <text:p text:style-name="P1">| 84 | Teimour Radjabov vs. Viswanathan Anand | 2006 | Linares | Sharp defensive stand and counterstrike in the Najdorf |</text:p>
      <text:p text:style-name="P1">| 85 | Sergey Karjakin vs. Magnus Carlsen | 2012 | World Rapid Ch. | Modern strategic navigation inside the Sicilian Sveshnikov |</text:p>
      <text:p text:style-name="P1">| 86 | Fabiano Caruana vs. Magnus Carlsen | 2018 | World Ch. (Game 12) | High-stress theoretical duel in the Sveshnikov on the biggest stage |</text:p>
      <text:p text:style-name="P1">| 87 | Alexander Morozevich vs. Peter Leko | 2005 | San Luis World Ch. | Creative, non-standard approach to breaking down the Sicilian |</text:p>
      <text:p text:style-name="P1">| 88 | Vassily Ivanchuk vs. Anish Giri | 2012 | Reggio Emilia | Masterful piece coordination fighting against the Sicilian structure |</text:p>
      <text:p text:style-name="P1">| 89 | Hikaru Nakamura vs. Magnus Carlsen | 2011 | London Classic | High-stakes dynamic calculation in a sharp Open Sicilian setup |</text:p>
      <text:p text:style-name="P1">| 90 | Ding Liren vs. Hikaru Nakamura | 2022 | Candidates Tournament | Positional clamp vs. tactical breaking points in the Sicilian |</text:p>
      <text:p text:style-name="P1">| 91 | Ian Nepomniachtchi vs. Maxime Vachier-Lagrave | 2020 | Candidates Tournament | High-stress theoretical line execution in the Najdorf Poisoned Pawn |</text:p>
      <text:p text:style-name="P1">| 92 | Bobby Fischer vs. Samuel Reshevsky | 1958 | US Championship | Trapping the Black queen early in a thematic Sicilian variation |</text:p>
      <text:p text:style-name="P1"><text:soft-page-break/>| 93 | Mikhail Tal vs. Najdorf | 1961 | Leipzig | The magician executes an intuitive piece sacrifice on d5 |</text:p>
      <text:p text:style-name="P1">| 94 | Efim Geller vs. Bobby Fischer | 1967 | Skopje | White dismantles the Najdorf using an aggressive kingside attack |</text:p>
      <text:p text:style-name="P1">| 95 | Garry Kasparov vs. Veselin Topalov | 1997 | Novgorod | The ultimate modern blueprint for playing the White side of the Najdorf |</text:p>
      <text:p text:style-name="P1">| 96 | Peter Leko vs. Viswanathan Anand | 2001 | Linares | Perfect demonstration of dynamic defense in the Sicilian Sveshnikov |</text:p>
      <text:p text:style-name="P1">| 97 | Vassily Ivanchuk vs. Vladimir Kramnik | 1994 | Horgen | Creative tactical breakthrough against the Sicilian Scheveningen |</text:p>
      <text:p text:style-name="P1">| 98 | Maxime Vachier-Lagrave vs. Viswanathan Anand | 2015 | London Classic | Elite-level demonstration of Najdorf dynamic counter-attack paths |</text:p>
      <text:p text:style-name="P1">| 99 | D Gukesh vs. Alireza Firouzja | 2024 | Candidates Tournament | Sharp calculation under severe time pressure in an open Sicilian |</text:p>
      <text:p text:style-name="P1">| 100 | Praggnanandhaa R vs. Fabiano Caruana | 2023 | World Cup | Elite positional handling of the anti-Sicilian structures |</text:p>
      <text:p text:style-name="P1">## 🧭 Category 5: Mastering the Initiative (cat_initiative)</text:p>
      <text:p text:style-name="P1">*Focus: Maintaining steady, active pressure, forcing the opponent onto the defensive, and compounding small mistakes into a decisive attack.*</text:p>
      <text:p text:style-name="P1">| # | Matchup (White vs. Black) | Year | Event / Context | Core Educational Theme |</text:p>
      <text:p text:style-name="P1">|---|---|---|---|---|</text:p>
      <text:p text:style-name="P1">| 101 | Paul Morphy vs. Louis Paulsen | 1858 | New York Match | Seizing and maintaining an unshakeable initiative from move one |</text:p>
      <text:p text:style-name="P1">| 102 | Alexander Alekhine vs. Emanuel Lasker | 1934 | Zurich | Continual transformation of threats to keep the defender paralyzed |</text:p>
      <text:p text:style-name="P1">| 103 | Rudolf Spielmann vs. Akiba Rubinstein | 1911 | San Sebastian | Relentless energy in building a kingside initiative |</text:p>
      <text:p text:style-name="P1">| 104 | David Bronstein vs. Paul Keres | 1950 | Budapest Candidates | Sacrificing structural integrity for active piece mobilization |</text:p>
      <text:p text:style-name="P1">| 105 | Mikhail Tal vs. Mikhail Botvinnik | 1960 | World Ch. (Game 1) | The iconic game showing psychological initiative over physical safety |</text:p>
      <text:p text:style-name="P1">| 106 | Bobby Fischer vs. Mark Taimanov | 1971 | Candidates Quarterfinal | Sustained tactical tension that suffocates the defender |</text:p>
      <text:p text:style-name="P1">| 107 | Garry Kasparov vs. Anatoly Karpov | 1985 | World Ch. (Game 11) | Direct, energetic play designed to crash a passive setup |</text:p>
      <text:p text:style-name="P1">| 108 | Viswanathan Anand vs. Anatoly Karpov | 1991 | Brussels Candidates | Overwhelming development leading to a completely dominant board state |</text:p>
      <text:p text:style-name="P1">| 109 | Alexei Shirov vs. Vladimir Kramnik | 1994 | Linares | Concrete, aggressive calculation designed to maintain tactical threats |</text:p>
      <text:p text:style-name="P1">| 110 | Veselin Topalov vs. Vladimir Kramnik | 1998 | Linares | Creating long-term attacking chances out of a quiet structure |</text:p>
      <text:p text:style-name="P1"><text:soft-page-break/>| 111 | Magnus Carlsen vs. Levon Aronian | 2008 | Linares | Converting a tiny development lead into a massive spatial squeeze |</text:p>
      <text:p text:style-name="P1">| 112 | Levon Aronian vs. Sergey Karjakin | 2014 | Wijk aan Zee | Brilliant space clearance moves to open attacking channels |</text:p>
      <text:p text:style-name="P1">| 113 | Fabiano Caruana vs. Veselin Topalov | 2014 | Sinquefield Cup | Seamlessly connecting tactical threats with structural advancement |</text:p>
      <text:p text:style-name="P1">| 114 | Hikaru Nakamura vs. Wesley So | 2015 | Shamkir Chess | Constant creation of structural targets to disrupt defensive setups |</text:p>
      <text:p text:style-name="P1">| 115 | Ian Nepomniachtchi vs. Ding Liren | 2023 | World Ch. (Game 5) | Keeping high tactical tension alive to break open the center |</text:p>
      <text:p text:style-name="P1">| 116 | Richard Réti vs. Akiba Rubinstein | 1923 | Moravska Ostrava | Transitioning from positional defense to a sudden central breakthrough |</text:p>
      <text:p text:style-name="P1">| 117 | Mikhail Botvinnik vs. Vasily Smyslov | 1954 | World Ch. (Game 13) | Strategic manipulation of files to force open entry points |</text:p>
      <text:p text:style-name="P1">| 118 | Boris Spassky vs. Bobby Fischer | 1972 | World Ch. (Game 11) | Poisoned Pawn Najdorf where White maintains a dangerous attack |</text:p>
      <text:p text:style-name="P1">| 119 | Garry Kasparov vs. John Nunn | 1982 | Lucerne Olympiad | Masterclass execution of open-board tactical pressure |</text:p>
      <text:p text:style-name="P1">| 120 | Vassily Ivanchuk vs. Artur Yusupov | 1991 | Brussels Candidates | Converting an early initiative into a devastating tactical endgame |</text:p>
      <text:p text:style-name="P1">| 121 | Vladimir Kramnik vs. Peter Leko | 2004 | World Ch. (Game 14) | Precise, aggressive direct play to break down a defensive wall |</text:p>
      <text:p text:style-name="P1">| 122 | Alexander Morozevich vs. Viswanathan Anand | 2007 | Mexico City | Unorthodox piece setups designed to force early structural problems |</text:p>
      <text:p text:style-name="P1">| 123 | Ding Liren vs. Fabiano Caruana | 2018 | Candidates Tournament | Relentless central expansion to restrict the opponent's pieces |</text:p>
      <text:p text:style-name="P1">| 124 | Alireza Firouzja vs. Nodirbek Abdusattorov | 2022 | Chess.com Global | Computer-era rapid piece coordination for maximum board dynamic |</text:p>
      <text:p text:style-name="P1">| 125 | D Gukesh vs. Praggnanandhaa R | 2024 | Candidates Tournament | High-level precision showing how to stretch an opponent's defense |</text:p>
      <text:p text:style-name="P1">## 🧱 Category 6: Pawn Structure Dynamics (cat_pawn_dynamics)</text:p>
      <text:p text:style-name="P1">*Focus: Navigating complex pawn webs, utilizing minority attacks, managing isolated pawns, and executing structural breakthroughs.*</text:p>
      <text:p text:style-name="P1">| # | Matchup (White vs. Black) | Year | Event / Context | Core Educational Theme |</text:p>
      <text:p text:style-name="P1">|---|---|---|---|---|</text:p>
      <text:p text:style-name="P1">| 126 | Wilhelm Steinitz vs. Mikhail Chigorin | 1892 | World Ch. (Game 9) | The foundational textbook game on managing backward pawns |</text:p>
      <text:p text:style-name="P1">| 127 | Akiba Rubinstein vs. Georg Salwe | 1908 | Lodz | The ultimate instructional model for utilizing an outpost square |</text:p>
      <text:p text:style-name="P1">| 128 | José Raúl Capablanca vs. Emanuel Lasker | 1924 | New York | Exploiting structural double pawns and static weaknesses |</text:p>
      <text:p text:style-name="P1"><text:soft-page-break/>| 129 | Max Euwe vs. Aron Nimzowitsch | 1927 | Bad Niendorf | Advanced blockading tactics inside an uneven pawn layout |</text:p>
      <text:p text:style-name="P1">| 130 | Mikhail Botvinnik vs. Alexander Alekhine | 1936 | Nottingham | Playing with and converting an Isolated Queen's Pawn (IQP) |</text:p>
      <text:p text:style-name="P1">| 131 | Miguel Najdorf vs. Mikhail Botvinnik | 1948 | World Championship | Dynamic transition of pawn chains in the French Defense |</text:p>
      <text:p text:style-name="P1">| 132 | Tigran Petrosian vs. Bent Larsen | 1966 | Santa Monica | Positional exchange sacrifice to control structural pawn weaknesses |</text:p>
      <text:p text:style-name="P1">| 133 | Anatoly Karpov vs. Boris Spassky | 1974 | Candidates Match | Absolute textbook demonstration of a minority pawn attack |</text:p>
      <text:p text:style-name="P1">| 134 | Bobby Fischer vs. Boris Spassky | 1992 | Belgrade Match (Game 1) | Classic structural breakdown of a hanging pawn duo |</text:p>
      <text:p text:style-name="P1">| 135 | Garry Kasparov vs. Anatoly Karpov | 1986 | World Ch. (Game 22) | High-stakes mastery of complex, locked central pawn chains |</text:p>
      <text:p text:style-name="P1">| 136 | Vladimir Kramnik vs. Garry Kasparov | 1994 | Linares | Managing dynamic, mobile pawn majorities in the middlegame |</text:p>
      <text:p text:style-name="P1">| 137 | Viswanathan Anand vs. Michael Adams | 2001 | World Ch. Semifinal | Exploiting weaknesses created by isolated central pawn pushes |</text:p>
      <text:p text:style-name="P1">| 138 | Peter Leko vs. Vladimir Kramnik | 2004 | World Ch. (Game 8) | High-theory handling of asymmetric pawn structures |</text:p>
      <text:p text:style-name="P1">| 139 | Magnus Carlsen vs. Hikaru Nakamura | 2013 | Tal Memorial | Converting a microscopic pawn structure advantage in the endgame |</text:p>
      <text:p text:style-name="P1">| 140 | Fabiano Caruana vs. Teimour Radjabov | 2013 | Zug Grand Prix | Systematic pressure against a compromised pawn configuration |</text:p>
      <text:p text:style-name="P1">| 141 | Levon Aronian vs. Viswanathan Anand | 2017 | London Chess Classic | Creating and executing a passed pawn breakthrough in the center |</text:p>
      <text:p text:style-name="P1">| 142 | Ding Liren vs. Magnus Carlsen | 2019 | Sinquefield Cup Tiebreak | Dynamic handling of symmetrical structures under quick time limits |</text:p>
      <text:p text:style-name="P1">| 143 | Ian Nepomniachtchi vs. Sergey Karjakin | 2020 | Russian Championship | High-tension calculation around overlapping passed pawns |</text:p>
      <text:p text:style-name="P1">| 144 | Wesley So vs. Fabiano Caruana | 2021 | US Championship | Structural clamp technique using solid pawn chains |</text:p>
      <text:p text:style-name="P1">| 145 | Richard Réti vs. Emanuel Lasker | 1924 | New York | Dismantling a central pawn wall using hypermodern flank pressure |</text:p>
      <text:p text:style-name="P1">| 146 | Vasily Smyslov vs. Paul Keres | 1953 | Zurich Candidates | Masterclass on utilizing pawn majorities on the queenside |</text:p>
      <text:p text:style-name="P1">| 147 | Boris Spassky vs. Anatoly Karpov | 1974 | Candidates Match | Positional lesson on creating and exploiting long-term pawn gaps |</text:p>
      <text:p text:style-name="P1">| 148 | Garry Kasparov vs. Vladimir Kramnik | 1993 | Linares | Dynamic center creation using an un-isolated pawn storm |</text:p>
      <text:p text:style-name="P1">| 149 | Veselin Topalov vs. Alexei Shirov | 2006 | Sofia | Sharp tactical fireworks arising directly from an IQP structure |</text:p>
      <text:p text:style-name="P1"><text:soft-page-break/>| 150 | Maxime Vachier-Lagrave vs. Ding Liren | 2020 | Candidates Tournament | High-level theoretical handling of Carlsbad pawn structures |</text:p>
      <text:p text:style-name="P1">## 🎯 Category 7: The Power of the Bishop Pair (cat_bishop_pair)</text:p>
      <text:p text:style-name="P1">*Focus: Utilizing the long-range power of two bishops to dominate open boards, restrict enemy knights, and execute laser-like tactical combinations.*</text:p>
      <text:p text:style-name="P1">| # | Matchup (White vs. Black) | Year | Event / Context | Core Educational Theme |</text:p>
      <text:p text:style-name="P1">|---|---|---|---|---|</text:p>
      <text:p text:style-name="P1">| 151 | Louis Paulsen vs. Wilhelm Steinitz | 1873 | Vienna | The historic game that first demonstrated the systematic power of the bishop pair |</text:p>
      <text:p text:style-name="P1">| 152 | Akiba Rubinstein vs. Emanuel Lasker | 1909 | St. Petersburg | Perfect coordination of the two bishops in an open middlegame |</text:p>
      <text:p text:style-name="P1">| 153 | José Raúl Capablanca vs. Rudolf Spielmann | 1927 | New York | Textbook example of using two bishops to restrict an enemy knight pair |</text:p>
      <text:p text:style-name="P1">| 154 | Alexander Alekhine vs. Max Euwe | 1935 | World Ch. (Game 1) | Cutting through the opponent's defenses with diagonal crossfires |</text:p>
      <text:p text:style-name="P1">| 155 | Mikhail Botvinnik vs. Vasily Smyslov | 1954 | World Ch. (Game 12) | Opening up the board systematically to unleash the two bishops |</text:p>
      <text:p text:style-name="P1">| 156 | Bobby Fischer vs. Laszlo Szabo | 1962 | Stockholm Interzonal | Using the bishop pair to generate a sudden, devastating kingside attack |</text:p>
      <text:p text:style-name="P1">| 157 | Robert Byrne vs. Bobby Fischer | 1967 | Sousse Interzonal | Converting an endgame advantage using active, long-range bishops |</text:p>
      <text:p text:style-name="P1">| 158 | Anatoly Karpov vs. Garry Kasparov | 1985 | World Ch. (Game 4) | High-stakes positional clinic on keeping the bishop pair alive |</text:p>
      <text:p text:style-name="P1">| 159 | Garry Kasparov vs. Tony Miles | 1986 | Basel Match | Absolute devastation on open diagonals against an exposed king |</text:p>
      <text:p text:style-name="P1">| 160 | Vladimir Kramnik vs. Veselin Topalov | 1997 | Dos Hermanas | Restricting an active knight and bishop combo using the true pair |</text:p>
      <text:p text:style-name="P1">| 161 | Viswanathan Anand vs. Alexey Shirov | 2000 | World Ch. (Game 4) | High-velocity tactical display using opposite-colored bishop pairs |</text:p>
      <text:p text:style-name="P1">| 162 | Peter Leko vs. Magnus Carlsen | 2008 | Nice | Gradual endgame squeeze showing the superiority of bishops over knights |</text:p>
      <text:p text:style-name="P1">| 163 | Levon Aronian vs. Vladimir Kramnik | 2012 | Zurich Match | Masterful use of the bishops to create dual-flank pawn vulnerabilities |</text:p>
      <text:p text:style-name="P1">| 164 | Fabiano Caruana vs. Hikaru Nakamura | 2014 | Sinquefield Cup | Elite-level demonstration of tactical coordination using two bishops |</text:p>
      <text:p text:style-name="P1">| 165 | Magnus Carlsen vs. Anish Giri | 2019 | Wijk aan Zee | Converting a seemingly flat position into a win via bishop pairs |</text:p>
      <text:p text:style-name="P1">| 166 | Ding Liren vs. Sergey Karjakin | 2018 | Candidates Tournament | Complete spatial domination of the board utilizing long-range diagonals |</text:p>
      <text:p text:style-name="P1">| 167 | Ian Nepomniachtchi vs. Fabiano Caruana | 2020 | Candidates Tournament | High-tension tactical calculations around dominant central bishops |</text:p>
      <text:p text:style-name="P1"><text:soft-page-break/>| 168 | Wesley So vs. Magnus Carlsen | 2021 | FTX Crypto Cup | Neutralizing dynamic threats using a highly solid defensive bishop pair |</text:p>
      <text:p text:style-name="P1">| 169 | Alireza Firouzja vs. Levon Aronian | 2021 | Grand Swiss | Ultra-modern tactical execution showing maximum bishop speed |</text:p>
      <text:p text:style-name="P1">| 170 | D Gukesh vs. Vidit Gujrathi | 2024 | Candidates Tournament | Positional mastery utilizing two bishops to choke off counterplay |</text:p>
      <text:p text:style-name="P1">| 171 | Siegbert Tarrasch vs. David Janowski | 1898 | Vienna | Classical instruction on opening lines for the bishops via pawn breaks |</text:p>
      <text:p text:style-name="P1">| 172 | Richard Réti vs. Aron Nimzowitsch | 1928 | Berlin | Using fianchettoed double bishops to control the entire center |</text:p>
      <text:p text:style-name="P1">| 173 | Mikhail Tal vs. Bent Larsen | 1965 | Candidates Match | Sacrificing structural safety to activate dormant bishops on key diagonals |</text:p>
      <text:p text:style-name="P1">| 174 | Vassily Ivanchuk vs. Garry Kasparov | 1995 | Horgen | Creative manipulation of squares to establish dominant bishop outposts |</text:p>
      <text:p text:style-name="P1">| 175 | Hikaru Nakamura vs. Vladimir Kramnik | 2011 | London Classic | High-stakes theoretical duel showing the aggressive power of the pair |</text:p>
      <text:p text:style-name="P1">## 🛡️ Category 8: The Art of the Escape (cat_defensive_saves)</text:p>
      <text:p text:style-name="P1">*Focus: Psychological resilience, finding miraculous swindles, constructing fortresses, and utilizing unexpected perpetual checks from completely lost positions.*</text:p>
      <text:p text:style-name="P1">| # | Matchup (White vs. Black) | Year | Event / Context | Core Educational Theme |</text:p>
      <text:p text:style-name="P1">|---|---|---|---|---|</text:p>
      <text:p text:style-name="P1">| 176 | Emanuel Lasker vs. Carl Schlechter | 1910 | World Ch. (Game 10) | The ultimate high-stakes psychological escape to retain the crown |</text:p>
      <text:p text:style-name="P1">| 177 | Frank Marshall vs. Marco | 1904 | Monte Carlo | Finding a hidden tactical combination to secure a draw in a lost endgame |</text:p>
      <text:p text:style-name="P1">| 178 | José Raúl Capablanca vs. Aron Nimzowitsch | 1914 | St. Petersburg | Constructing an impenetrable defensive wall under severe positional pressure |</text:p>
      <text:p text:style-name="P1">| 179 | Alexander Alekhine vs. Réti | 1922 | Vienna | Finding active tactical counter-chances when backed into a corner |</text:p>
      <text:p text:style-name="P1">| 180 | Milan Vidmar vs. Geza Maroczy | 1927 | London | Building a textbook historical piece fortress to split the point |</text:p>
      <text:p text:style-name="P1">| 181 | Mikhail Botvinnik vs. Mikhail Tal | 1961 | World Ch. (Game 16) | High-stakes positional resilience to defuse a tactical storm |</text:p>
      <text:p text:style-name="P1">| 182 | Bobby Fischer vs. Mikhail Tal | 1960 | Leipzig Olympiad | Miraculous tactical resourcefulness to escape a fierce king assault |</text:p>
      <text:p text:style-name="P1">| 183 | Anatoly Karpov vs. Viktor Korchnoi | 1978 | World Ch. (Game 5) | Finding an unexpected perpetual check path under heavy pressure |</text:p>
      <text:p text:style-name="P1">| 184 | Garry Kasparov vs. Anatoly Karpov | 1987 | World Ch. (Game 23) | Defending a microscopic disadvantage against a precise attacker |</text:p>
      <text:p text:style-name="P1">| 185 | Viswanathan Anand vs. Garry Kasparov | 1995 | World Ch. (Game 6) | Incredible defensive tenacity to hold a down-material endgame |</text:p>
      <text:p text:style-name="P1"><text:soft-page-break/>| 186 | Vladimir Kramnik vs. Peter Leko | 2004 | World Ch. (Game 5) | Precise technical calculation to establish a drawing fortress |</text:p>
      <text:p text:style-name="P1">| 187 | Peter Svidler vs. Magnus Carlsen | 2013 | London Candidates | Finding highly creative defensive resources under intense time pressure |</text:p>
      <text:p text:style-name="P1">| 188 | Levon Aronian vs. Fabiano Caruana | 2016 | Moscow Candidates | Miraculous endgame swindle utilizing hidden tactical checkmate threats |</text:p>
      <text:p text:style-name="P1">| 189 | Sergey Karjakin vs. Magnus Carlsen | 2016 | World Ch. (Game 3) | The "Minister of Defense" holds an impossible endgame |</text:p>
      <text:p text:style-name="P1">| 190 | Hikaru Nakamura vs. Magnus Carlsen | 2014 | Zurich Chess Challenge | Finding a stunning hidden tactical resource to swindle a draw |</text:p>
      <text:p text:style-name="P1">| 191 | Fabiano Caruana vs. Anish Giri | 2016 | Candidates Tournament | Deep tactical calculations to accurately navigate out of a mating net |</text:p>
      <text:p text:style-name="P1">| 192 | Ding Liren vs. Ian Nepomniachtchi | 2023 | World Ch. (Game 14) | Incredible resilience to save a highly unstable position under pressure |</text:p>
      <text:p text:style-name="P1">| 193 | Ian Nepomniachtchi vs. Fabiano Caruana | 2024 | Candidates Tournament | High-stakes survival story under relentless endgame pressure |</text:p>
      <text:p text:style-name="P1">| 194 | R Praggnanandhaa vs. Magnus Carlsen | 2023 | World Cup Final | Finding accurate, forced drawing lines against the best endgame player |</text:p>
      <text:p text:style-name="P1">| 195 | D Gukesh vs. Fabiano Caruana | 2024 | Candidates Tournament (R10) | Holding a razor-sharp, inferior position through active piece counterplay |</text:p>
      <text:p text:style-name="P1">| 196 | David Bronstein vs. Isaac Boleslavsky | 1950 | Moscow Candidates Match | Finding a deep tactical saving combination in a highly complex structure |</text:p>
      <text:p text:style-name="P1">| 197 | Viktor Korchnoi vs. Anatoly Karpov | 1981 | World Ch. (Game 2) | High-stakes defensive masterclass under a positional squeeze |</text:p>
      <text:p text:style-name="P1">| 198 | Garry Kasparov vs. Viswanathan Anand | 1996 | Las Palmas | Miraculous back-rank resource to halt an aggressive kingside assault |</text:p>
      <text:p text:style-name="P1">| 199 | Anish Giri vs. Magnus Carlsen | 2020 | Chessable Masters | Constructing an airtight defensive shape to split the point |</text:p>
      <text:p text:style-name="P1">| 200 | Alireza Firouzja vs. Ian Nepomniachtchi | 2022 | Candidates Tournament | Active, defensive complications used to swindle out of a lost position |</text:p>
      <text:p text:style-name="Text_20_body"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1T14:29:44.139949000</meta:creation-date>
    <dc:date>2026-06-11T14:34:06.323254100</dc:date>
    <meta:editing-duration>PT4M31S</meta:editing-duration>
    <meta:editing-cycles>1</meta:editing-cycles>
    <meta:document-statistic meta:table-count="0" meta:image-count="0" meta:object-count="0" meta:page-count="11" meta:paragraph-count="234" meta:word-count="5223" meta:character-count="29289" meta:non-whitespace-character-count="24338"/>
    <meta:generator>LibreOffice/26.2.3.2$Windows_X86_64 LibreOffice_project/70e089b17412e4cb7773e41413306b17a2328c34</meta:generator>
  </office:meta>
</office:document-meta>
</file>